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12.99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6.636cm"/>
    </style:style>
    <style:style style:name="co7" style:family="table-column">
      <style:table-column-properties fo:break-before="auto" style:column-width="1.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  <style:style style:name="ce2" style:family="table-cell" style:parent-style-name="Excel_20_Built-in_20_Normal" style:data-style-name="N104">
      <style:table-cell-properties fo:background-color="#ffff00"/>
    </style:style>
    <style:style style:name="ce3" style:family="table-cell" style:parent-style-name="Excel_20_Built-in_20_Normal" style:data-style-name="N103">
      <style:table-cell-properties fo:background-color="#ffff00"/>
    </style:style>
    <style:style style:name="ce4" style:family="table-cell" style:parent-style-name="Excel_20_Built-in_20_Normal" style:data-style-name="N8000"/>
    <style:style style:name="ce5" style:family="table-cell" style:parent-style-name="Excel_20_Built-in_20_Normal">
      <style:table-cell-properties fo:background-color="#66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5"/>
        <table:table-column table:style-name="co7" table:number-columns-repeated="1018" table:default-cell-style-name="Excel_20_Built-in_20_Normal"/>
        <table:table-row table:style-name="ro1">
          <table:table-cell office:value-type="string">
            <text:p>@odata.etag</text:p>
          </table:table-cell>
          <table:table-cell office:value-type="string">
            <text:p>cr082_codice</text:p>
          </table:table-cell>
          <table:table-cell office:value-type="string">
            <text:p>cr082_nome</text:p>
          </table:table-cell>
          <table:table-cell office:value-type="string">
            <text:p>cr082_is_deleted</text:p>
          </table:table-cell>
          <table:table-cell office:value-type="string">
            <text:p>cr082_codice_eniter</text:p>
          </table:table-cell>
          <table:table-cell office:value-type="string">
            <text:p>cr082_sip_societaid</text:p>
          </table:table-cell>
          <table:table-cell table:number-columns-repeated="1018"/>
        </table:table-row>
        <table:table-row table:style-name="ro1">
          <table:table-cell office:value-type="string">
            <text:p>W/"5882814"</text:p>
          </table:table-cell>
          <table:table-cell office:value-type="string">
            <text:p>2015-00</text:p>
          </table:table-cell>
          <table:table-cell office:value-type="string">
            <text:p>ACAM Client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6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9"</text:p>
          </table:table-cell>
          <table:table-cell office:value-type="string">
            <text:p>1188-00</text:p>
          </table:table-cell>
          <table:table-cell office:value-type="string">
            <text:p>ADRIAPLIN Podjetje za distribucijo zemeljskega plina d.o.o. Ljubljan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1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1"</text:p>
          </table:table-cell>
          <table:table-cell office:value-type="string">
            <text:p>2688-00</text:p>
          </table:table-cell>
          <table:table-cell office:value-type="string">
            <text:p>Agenzia Giornalistica Italia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88</text:p>
          </table:table-cell>
          <table:table-cell office:value-type="string">
            <text:p>c8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2"</text:p>
          </table:table-cell>
          <table:table-cell office:value-type="string">
            <text:p>0120-00</text:p>
          </table:table-cell>
          <table:table-cell office:value-type="string">
            <text:p>Agenzia Giornalistica Itali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3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5"</text:p>
          </table:table-cell>
          <table:table-cell office:value-type="string">
            <text:p>0120-00</text:p>
          </table:table-cell>
          <table:table-cell office:value-type="string">
            <text:p>AGI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50</text:p>
          </table:table-cell>
          <table:table-cell office:value-type="string">
            <text:p>fb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3"</text:p>
          </table:table-cell>
          <table:table-cell office:value-type="string">
            <text:p>0023-00</text:p>
          </table:table-cell>
          <table:table-cell office:value-type="string">
            <text:p>AGIBA PETROLEUM CO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0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8"</text:p>
          </table:table-cell>
          <table:table-cell office:value-type="string">
            <text:p>02636-00</text:p>
          </table:table-cell>
          <table:table-cell office:value-type="string">
            <text:p>Agip Caspian Sea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36</text:p>
          </table:table-cell>
          <table:table-cell office:value-type="string">
            <text:p>4b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7"</text:p>
          </table:table-cell>
          <table:table-cell office:value-type="string">
            <text:p>1179-00</text:p>
          </table:table-cell>
          <table:table-cell office:value-type="string">
            <text:p>Agip Caspian Se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7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6"</text:p>
          </table:table-cell>
          <table:table-cell office:value-type="string">
            <text:p>0413-00</text:p>
          </table:table-cell>
          <table:table-cell office:value-type="string">
            <text:p>AGIP ENERGY AND NATURAL RESOURCES (NIGERIA)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2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0"</text:p>
          </table:table-cell>
          <table:table-cell office:value-type="string">
            <text:p>0421-00</text:p>
          </table:table-cell>
          <table:table-cell office:value-type="string">
            <text:p>AGIP ENERGY AND NATURAL RESOURCES (NIGERIA)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8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5"</text:p>
          </table:table-cell>
          <table:table-cell office:value-type="string">
            <text:p>1160-00</text:p>
          </table:table-cell>
          <table:table-cell office:value-type="string">
            <text:p>Agip Karachaganak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d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5"</text:p>
          </table:table-cell>
          <table:table-cell office:value-type="string">
            <text:p>2649-00</text:p>
          </table:table-cell>
          <table:table-cell office:value-type="string">
            <text:p>Agip Oil Ecuador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49</text:p>
          </table:table-cell>
          <table:table-cell office:value-type="string">
            <text:p>c5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4"</text:p>
          </table:table-cell>
          <table:table-cell office:value-type="string">
            <text:p>1330-00</text:p>
          </table:table-cell>
          <table:table-cell office:value-type="string">
            <text:p>Agip Oil Ecuador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e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0"</text:p>
          </table:table-cell>
          <table:table-cell office:value-type="string">
            <text:p>2799-00</text:p>
          </table:table-cell>
          <table:table-cell office:value-type="string">
            <text:p>Agrikroton Srl - Società Agricol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6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5"</text:p>
          </table:table-cell>
          <table:table-cell office:value-type="string">
            <text:p>2510-00</text:p>
          </table:table-cell>
          <table:table-cell office:value-type="string">
            <text:p>Arm Wind LLP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e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7"</text:p>
          </table:table-cell>
          <table:table-cell office:value-type="string">
            <text:p>A005-00</text:p>
          </table:table-cell>
          <table:table-cell office:value-type="string">
            <text:p>ASSOCIATION SONATRACH FCP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a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3"</text:p>
          </table:table-cell>
          <table:table-cell office:value-type="string">
            <text:p>3054-00</text:p>
          </table:table-cell>
          <table:table-cell office:value-type="string">
            <text:p>Aten Oil Activos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7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4"</text:p>
          </table:table-cell>
          <table:table-cell office:value-type="string">
            <text:p>3055-00</text:p>
          </table:table-cell>
          <table:table-cell office:value-type="string">
            <text:p>Aten Oil Operaciones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8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2"</text:p>
          </table:table-cell>
          <table:table-cell office:value-type="string">
            <text:p>2986-00</text:p>
          </table:table-cell>
          <table:table-cell office:value-type="string">
            <text:p>Aten Oil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a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2"</text:p>
          </table:table-cell>
          <table:table-cell office:value-type="string">
            <text:p>3053-00</text:p>
          </table:table-cell>
          <table:table-cell office:value-type="string">
            <text:p>Aten Oil Setor Activos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6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1"</text:p>
          </table:table-cell>
          <table:table-cell office:value-type="string">
            <text:p>3052-00</text:p>
          </table:table-cell>
          <table:table-cell office:value-type="string">
            <text:p>Aten Oil Setor Operaciones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5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9"</text:p>
          </table:table-cell>
          <table:table-cell office:value-type="string">
            <text:p>3050-00</text:p>
          </table:table-cell>
          <table:table-cell office:value-type="string">
            <text:p>Aten Oil Setor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0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5"</text:p>
          </table:table-cell>
          <table:table-cell office:value-type="float" office:value="2577">
            <text:p>2577</text:p>
          </table:table-cell>
          <table:table-cell office:value-type="string">
            <text:p>Azule Energy Angola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77</text:p>
          </table:table-cell>
          <table:table-cell office:value-type="string">
            <text:p>9e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5"</text:p>
          </table:table-cell>
          <table:table-cell office:value-type="string">
            <text:p>1232-00</text:p>
          </table:table-cell>
          <table:table-cell office:value-type="string">
            <text:p>Azule Energy Angol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8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2"</text:p>
          </table:table-cell>
          <table:table-cell office:value-type="string">
            <text:p>1308-00</text:p>
          </table:table-cell>
          <table:table-cell office:value-type="string">
            <text:p>Azule Energy Angola Production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cf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9"</text:p>
          </table:table-cell>
          <table:table-cell office:value-type="string">
            <text:p>2124-00</text:p>
          </table:table-cell>
          <table:table-cell office:value-type="string">
            <text:p>Azule Energy Angol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8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5"</text:p>
          </table:table-cell>
          <table:table-cell office:value-type="string">
            <text:p>2658-00</text:p>
          </table:table-cell>
          <table:table-cell office:value-type="string">
            <text:p>Azule Energy Holdings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9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2"</text:p>
          </table:table-cell>
          <table:table-cell office:value-type="string">
            <text:p>2929-00</text:p>
          </table:table-cell>
          <table:table-cell office:value-type="string">
            <text:p>Bacton CCS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8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2"</text:p>
          </table:table-cell>
          <table:table-cell office:value-type="string">
            <text:p>0800-14</text:p>
          </table:table-cell>
          <table:table-cell office:value-type="string">
            <text:p>Banque Eni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001</text:p>
          </table:table-cell>
          <table:table-cell office:value-type="string">
            <text:p>5e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7"</text:p>
          </table:table-cell>
          <table:table-cell office:value-type="string">
            <text:p>2053-00</text:p>
          </table:table-cell>
          <table:table-cell office:value-type="string">
            <text:p>Banque Eni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5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0"</text:p>
          </table:table-cell>
          <table:table-cell office:value-type="string">
            <text:p>2687-00</text:p>
          </table:table-cell>
          <table:table-cell office:value-type="string">
            <text:p>BE CHARGE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87</text:p>
          </table:table-cell>
          <table:table-cell office:value-type="string">
            <text:p>57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1"</text:p>
          </table:table-cell>
          <table:table-cell office:value-type="string">
            <text:p>2686-00</text:p>
          </table:table-cell>
          <table:table-cell office:value-type="string">
            <text:p>Be Power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86U000</text:p>
          </table:table-cell>
          <table:table-cell office:value-type="string">
            <text:p>c9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5"</text:p>
          </table:table-cell>
          <table:table-cell office:value-type="string">
            <text:p>0210-00</text:p>
          </table:table-cell>
          <table:table-cell office:value-type="string">
            <text:p>Bioraffineria di Gel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75</text:p>
          </table:table-cell>
          <table:table-cell office:value-type="string">
            <text:p>eb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4"</text:p>
          </table:table-cell>
          <table:table-cell office:value-type="string">
            <text:p>0625-00</text:p>
          </table:table-cell>
          <table:table-cell office:value-type="string">
            <text:p>Blue Stream Pipeline Company BV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050</text:p>
          </table:table-cell>
          <table:table-cell office:value-type="string">
            <text:p>ed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2"</text:p>
          </table:table-cell>
          <table:table-cell office:value-type="string">
            <text:p>1469-00</text:p>
          </table:table-cell>
          <table:table-cell office:value-type="string">
            <text:p>Blue Stream Pipeline Company BV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e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7"</text:p>
          </table:table-cell>
          <table:table-cell office:value-type="string">
            <text:p>02624-00</text:p>
          </table:table-cell>
          <table:table-cell office:value-type="string">
            <text:p>Brass LNG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4</text:p>
          </table:table-cell>
          <table:table-cell office:value-type="string">
            <text:p>54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3"</text:p>
          </table:table-cell>
          <table:table-cell office:value-type="string">
            <text:p>1971-00</text:p>
          </table:table-cell>
          <table:table-cell office:value-type="string">
            <text:p>Brass LNG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3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0"</text:p>
          </table:table-cell>
          <table:table-cell office:value-type="string">
            <text:p>1754-00</text:p>
          </table:table-cell>
          <table:table-cell office:value-type="string">
            <text:p>CARDÓN IV,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754</text:p>
          </table:table-cell>
          <table:table-cell office:value-type="string">
            <text:p>5b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5"</text:p>
          </table:table-cell>
          <table:table-cell office:value-type="string">
            <text:p>2040-00</text:p>
          </table:table-cell>
          <table:table-cell office:value-type="string">
            <text:p>CARDÓN IV,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b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5"</text:p>
          </table:table-cell>
          <table:table-cell office:value-type="string">
            <text:p>0800-31</text:p>
          </table:table-cell>
          <table:table-cell office:value-type="string">
            <text:p>CCUS &amp; Forestry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a2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2"</text:p>
          </table:table-cell>
          <table:table-cell office:value-type="string">
            <text:p>0800-07</text:p>
          </table:table-cell>
          <table:table-cell office:value-type="string">
            <text:p>CCUS &amp; Forestry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07</text:p>
          </table:table-cell>
          <table:table-cell office:value-type="string">
            <text:p>f6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0"</text:p>
          </table:table-cell>
          <table:table-cell office:value-type="string">
            <text:p>0800-21</text:p>
          </table:table-cell>
          <table:table-cell office:value-type="string">
            <text:p>CORAL FLNG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28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1"</text:p>
          </table:table-cell>
          <table:table-cell office:value-type="string">
            <text:p>2455-00</text:p>
          </table:table-cell>
          <table:table-cell office:value-type="string">
            <text:p>CORAL FLNG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b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2"</text:p>
          </table:table-cell>
          <table:table-cell office:value-type="string">
            <text:p>2456-00</text:p>
          </table:table-cell>
          <table:table-cell office:value-type="string">
            <text:p>CORAL SOUTH FLNG DMC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c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6"</text:p>
          </table:table-cell>
          <table:table-cell office:value-type="string">
            <text:p>0286-00</text:p>
          </table:table-cell>
          <table:table-cell office:value-type="string">
            <text:p>Costiero Gas Livorno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0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3"</text:p>
          </table:table-cell>
          <table:table-cell office:value-type="string">
            <text:p>2944-00</text:p>
          </table:table-cell>
          <table:table-cell office:value-type="string">
            <text:p>Dagöplast A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9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4"</text:p>
          </table:table-cell>
          <table:table-cell office:value-type="string">
            <text:p>2593-00</text:p>
          </table:table-cell>
          <table:table-cell office:value-type="string">
            <text:p>Damietta LNG (DLNG) S.A.E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3</text:p>
          </table:table-cell>
          <table:table-cell office:value-type="string">
            <text:p>4d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9"</text:p>
          </table:table-cell>
          <table:table-cell office:value-type="string">
            <text:p>1942-00</text:p>
          </table:table-cell>
          <table:table-cell office:value-type="string">
            <text:p>Damietta LNG (DLNG) S.A.E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e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0"</text:p>
          </table:table-cell>
          <table:table-cell office:value-type="string">
            <text:p>0800-05</text:p>
          </table:table-cell>
          <table:table-cell office:value-type="string">
            <text:p>DIREZIONE MIDSTREAM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035</text:p>
          </table:table-cell>
          <table:table-cell office:value-type="string">
            <text:p>c7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6"</text:p>
          </table:table-cell>
          <table:table-cell office:value-type="string">
            <text:p>0115-00</text:p>
          </table:table-cell>
          <table:table-cell office:value-type="string">
            <text:p>DLNG Service SAE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4f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2"</text:p>
          </table:table-cell>
          <table:table-cell office:value-type="string">
            <text:p>1970-00</text:p>
          </table:table-cell>
          <table:table-cell office:value-type="string">
            <text:p>DLNG Service SA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1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6"</text:p>
          </table:table-cell>
          <table:table-cell office:value-type="string">
            <text:p>0800-04</text:p>
          </table:table-cell>
          <table:table-cell office:value-type="string">
            <text:p>Downstream &amp; Industrial Operation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19</text:p>
          </table:table-cell>
          <table:table-cell office:value-type="string">
            <text:p>1b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7"</text:p>
          </table:table-cell>
          <table:table-cell office:value-type="string">
            <text:p>0314-00</text:p>
          </table:table-cell>
          <table:table-cell office:value-type="string">
            <text:p>DUNASTYR Polisztirolgyártó Zártkoruen Mukodo Részvénytársaság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3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0"</text:p>
          </table:table-cell>
          <table:table-cell office:value-type="string">
            <text:p>2968-00</text:p>
          </table:table-cell>
          <table:table-cell office:value-type="string">
            <text:p>E&amp;E Algeria Touat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1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8"</text:p>
          </table:table-cell>
          <table:table-cell office:value-type="string">
            <text:p>0208-00</text:p>
          </table:table-cell>
          <table:table-cell office:value-type="string">
            <text:p>Ecofuel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678</text:p>
          </table:table-cell>
          <table:table-cell office:value-type="string">
            <text:p>c5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6"</text:p>
          </table:table-cell>
          <table:table-cell office:value-type="string">
            <text:p>2036-00</text:p>
          </table:table-cell>
          <table:table-cell office:value-type="string">
            <text:p>Ecofuel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d5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0"</text:p>
          </table:table-cell>
          <table:table-cell office:value-type="string">
            <text:p>1764-00</text:p>
          </table:table-cell>
          <table:table-cell office:value-type="string">
            <text:p>Ei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764</text:p>
          </table:table-cell>
          <table:table-cell office:value-type="string">
            <text:p>e3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4"</text:p>
          </table:table-cell>
          <table:table-cell office:value-type="string">
            <text:p>2655-00</text:p>
          </table:table-cell>
          <table:table-cell office:value-type="string">
            <text:p>ENERA CONSEIL SA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7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1"</text:p>
          </table:table-cell>
          <table:table-cell office:value-type="string">
            <text:p>0800-11</text:p>
          </table:table-cell>
          <table:table-cell office:value-type="string">
            <text:p>Energy Evolu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11</text:p>
          </table:table-cell>
          <table:table-cell office:value-type="string">
            <text:p>6b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8"</text:p>
          </table:table-cell>
          <table:table-cell office:value-type="string">
            <text:p>0800-10</text:p>
          </table:table-cell>
          <table:table-cell office:value-type="string">
            <text:p>Energy Evolution Development &amp; Technical Activity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10</text:p>
          </table:table-cell>
          <table:table-cell office:value-type="string">
            <text:p>f0ce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4"</text:p>
          </table:table-cell>
          <table:table-cell office:value-type="string">
            <text:p>0590-00</text:p>
          </table:table-cell>
          <table:table-cell office:value-type="string">
            <text:p>Energy Solutions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9e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0"</text:p>
          </table:table-cell>
          <table:table-cell office:value-type="string">
            <text:p>0800-06</text:p>
          </table:table-cell>
          <table:table-cell office:value-type="string">
            <text:p>Energy Solution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47</text:p>
          </table:table-cell>
          <table:table-cell office:value-type="string">
            <text:p>01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3"</text:p>
          </table:table-cell>
          <table:table-cell office:value-type="string">
            <text:p>2429-00</text:p>
          </table:table-cell>
          <table:table-cell office:value-type="string">
            <text:p>Eni Abu Dhabi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f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4"</text:p>
          </table:table-cell>
          <table:table-cell office:value-type="string">
            <text:p>2559-00</text:p>
          </table:table-cell>
          <table:table-cell office:value-type="string">
            <text:p>Eni Abu Dhabi Refining &amp; Trading Services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f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8"</text:p>
          </table:table-cell>
          <table:table-cell office:value-type="string">
            <text:p>0101-00</text:p>
          </table:table-cell>
          <table:table-cell office:value-type="string">
            <text:p>Eni Adfin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269</text:p>
          </table:table-cell>
          <table:table-cell office:value-type="string">
            <text:p>85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0"</text:p>
          </table:table-cell>
          <table:table-cell office:value-type="string">
            <text:p>0101-00</text:p>
          </table:table-cell>
          <table:table-cell office:value-type="string">
            <text:p>Eni Adfin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1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5"</text:p>
          </table:table-cell>
          <table:table-cell office:value-type="string">
            <text:p>2567-00</text:p>
          </table:table-cell>
          <table:table-cell office:value-type="string">
            <text:p>Eni Albani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4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1"</text:p>
          </table:table-cell>
          <table:table-cell office:value-type="string">
            <text:p>02622-00</text:p>
          </table:table-cell>
          <table:table-cell office:value-type="string">
            <text:p>Eni Algeria Production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2</text:p>
          </table:table-cell>
          <table:table-cell office:value-type="string">
            <text:p>ae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0"</text:p>
          </table:table-cell>
          <table:table-cell office:value-type="string">
            <text:p>1305-00</text:p>
          </table:table-cell>
          <table:table-cell office:value-type="string">
            <text:p>Eni Algeria Production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ba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7"</text:p>
          </table:table-cell>
          <table:table-cell office:value-type="string">
            <text:p>2124-00</text:p>
          </table:table-cell>
          <table:table-cell office:value-type="string">
            <text:p>eni angol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124</text:p>
          </table:table-cell>
          <table:table-cell office:value-type="string">
            <text:p>8f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4"</text:p>
          </table:table-cell>
          <table:table-cell office:value-type="string">
            <text:p>1055-00</text:p>
          </table:table-cell>
          <table:table-cell office:value-type="string">
            <text:p>Eni Argentina Exploraciòn y Explotaciòn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9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1"</text:p>
          </table:table-cell>
          <table:table-cell office:value-type="string">
            <text:p>1466-00</text:p>
          </table:table-cell>
          <table:table-cell office:value-type="string">
            <text:p>Eni Australi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d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4"</text:p>
          </table:table-cell>
          <table:table-cell office:value-type="string">
            <text:p>1495-00</text:p>
          </table:table-cell>
          <table:table-cell office:value-type="string">
            <text:p>Eni Australia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7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0"</text:p>
          </table:table-cell>
          <table:table-cell office:value-type="string">
            <text:p>0029-00</text:p>
          </table:table-cell>
          <table:table-cell office:value-type="string">
            <text:p>Eni Austria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4ce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1"</text:p>
          </table:table-cell>
          <table:table-cell office:value-type="string">
            <text:p>2293-00</text:p>
          </table:table-cell>
          <table:table-cell office:value-type="string">
            <text:p>Eni Bahrain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255</text:p>
          </table:table-cell>
          <table:table-cell office:value-type="string">
            <text:p>e3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8"</text:p>
          </table:table-cell>
          <table:table-cell office:value-type="string">
            <text:p>2540-00</text:p>
          </table:table-cell>
          <table:table-cell office:value-type="string">
            <text:p>Eni Bahrain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7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9"</text:p>
          </table:table-cell>
          <table:table-cell office:value-type="string">
            <text:p>2909-00</text:p>
          </table:table-cell>
          <table:table-cell office:value-type="string">
            <text:p>Eni CCUS Holding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5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3"</text:p>
          </table:table-cell>
          <table:table-cell office:value-type="string">
            <text:p>2689-00</text:p>
          </table:table-cell>
          <table:table-cell office:value-type="string">
            <text:p>Eni China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89</text:p>
          </table:table-cell>
          <table:table-cell office:value-type="string">
            <text:p>87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3"</text:p>
          </table:table-cell>
          <table:table-cell office:value-type="string">
            <text:p>1229-00</text:p>
          </table:table-cell>
          <table:table-cell office:value-type="string">
            <text:p>Eni Chin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6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1"</text:p>
          </table:table-cell>
          <table:table-cell office:value-type="string">
            <text:p>0209-00</text:p>
          </table:table-cell>
          <table:table-cell office:value-type="string">
            <text:p>Eni Congo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a9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2"</text:p>
          </table:table-cell>
          <table:table-cell office:value-type="string">
            <text:p>0018-00</text:p>
          </table:table-cell>
          <table:table-cell office:value-type="string">
            <text:p>Eni Congo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f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7"</text:p>
          </table:table-cell>
          <table:table-cell office:value-type="string">
            <text:p>0804-00</text:p>
          </table:table-cell>
          <table:table-cell office:value-type="string">
            <text:p>Eni Corporate University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425</text:p>
          </table:table-cell>
          <table:table-cell office:value-type="string">
            <text:p>84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3"</text:p>
          </table:table-cell>
          <table:table-cell office:value-type="string">
            <text:p>1489-00</text:p>
          </table:table-cell>
          <table:table-cell office:value-type="string">
            <text:p>Eni Cote d'Ivoire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0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2"</text:p>
          </table:table-cell>
          <table:table-cell office:value-type="string">
            <text:p>1222-00</text:p>
          </table:table-cell>
          <table:table-cell office:value-type="string">
            <text:p>Eni Croati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d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0"</text:p>
          </table:table-cell>
          <table:table-cell office:value-type="string">
            <text:p>2406-00</text:p>
          </table:table-cell>
          <table:table-cell office:value-type="string">
            <text:p>Eni Cyprus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b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7"</text:p>
          </table:table-cell>
          <table:table-cell office:value-type="string">
            <text:p>0150-00</text:p>
          </table:table-cell>
          <table:table-cell office:value-type="string">
            <text:p>Eni Denmark B.V.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d2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6"</text:p>
          </table:table-cell>
          <table:table-cell office:value-type="string">
            <text:p>1369-00</text:p>
          </table:table-cell>
          <table:table-cell office:value-type="string">
            <text:p>Eni Denmark B.V.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7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8"</text:p>
          </table:table-cell>
          <table:table-cell office:value-type="string">
            <text:p>0821-00</text:p>
          </table:table-cell>
          <table:table-cell office:value-type="string">
            <text:p>Eni Deutschland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61</text:p>
          </table:table-cell>
          <table:table-cell office:value-type="string">
            <text:p>21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4"</text:p>
          </table:table-cell>
          <table:table-cell office:value-type="string">
            <text:p>2048-00</text:p>
          </table:table-cell>
          <table:table-cell office:value-type="string">
            <text:p>eni east afric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048</text:p>
          </table:table-cell>
          <table:table-cell office:value-type="string">
            <text:p>cf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5"</text:p>
          </table:table-cell>
          <table:table-cell office:value-type="string">
            <text:p>02628-00</text:p>
          </table:table-cell>
          <table:table-cell office:value-type="string">
            <text:p>ENI ECUADOR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8</text:p>
          </table:table-cell>
          <table:table-cell office:value-type="string">
            <text:p>8e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6"</text:p>
          </table:table-cell>
          <table:table-cell office:value-type="string">
            <text:p>0737-00</text:p>
          </table:table-cell>
          <table:table-cell office:value-type="string">
            <text:p>ENI ECUADOR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0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5"</text:p>
          </table:table-cell>
          <table:table-cell office:value-type="string">
            <text:p>2139-00</text:p>
          </table:table-cell>
          <table:table-cell office:value-type="string">
            <text:p>Eni Energhi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7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8"</text:p>
          </table:table-cell>
          <table:table-cell office:value-type="string">
            <text:p>2386-00</text:p>
          </table:table-cell>
          <table:table-cell office:value-type="string">
            <text:p>Eni Energy (Shanghai) Co., Ltd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8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0"</text:p>
          </table:table-cell>
          <table:table-cell office:value-type="string">
            <text:p>2569-00</text:p>
          </table:table-cell>
          <table:table-cell office:value-type="string">
            <text:p>Eni Energy Activities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69</text:p>
          </table:table-cell>
          <table:table-cell office:value-type="string">
            <text:p>da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5"</text:p>
          </table:table-cell>
          <table:table-cell office:value-type="string">
            <text:p>2963-00</text:p>
          </table:table-cell>
          <table:table-cell office:value-type="string">
            <text:p>Eni Energy E&amp;P UK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7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6"</text:p>
          </table:table-cell>
          <table:table-cell office:value-type="string">
            <text:p>2964-00</text:p>
          </table:table-cell>
          <table:table-cell office:value-type="string">
            <text:p>Eni Energy Egypt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f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7"</text:p>
          </table:table-cell>
          <table:table-cell office:value-type="string">
            <text:p>2965-00</text:p>
          </table:table-cell>
          <table:table-cell office:value-type="string">
            <text:p>Eni Energy Group Holdings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7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4"</text:p>
          </table:table-cell>
          <table:table-cell office:value-type="string">
            <text:p>3003-00</text:p>
          </table:table-cell>
          <table:table-cell office:value-type="string">
            <text:p>Eni Energy Group Resourcing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0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8"</text:p>
          </table:table-cell>
          <table:table-cell office:value-type="string">
            <text:p>2966-00</text:p>
          </table:table-cell>
          <table:table-cell office:value-type="string">
            <text:p>Eni Energy Muara Bakau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8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9"</text:p>
          </table:table-cell>
          <table:table-cell office:value-type="string">
            <text:p>2967-00</text:p>
          </table:table-cell>
          <table:table-cell office:value-type="string">
            <text:p>Eni Energy Netherlands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b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3"</text:p>
          </table:table-cell>
          <table:table-cell table:style-name="ce2" office:value-type="date" office:date-value="2210-10-01">
            <text:p>2210-10</text:p>
          </table:table-cell>
          <table:table-cell office:value-type="string">
            <text:p>Eni Espana Comercializadora De Gas S.A.U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4c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8"</text:p>
          </table:table-cell>
          <table:table-cell office:value-type="string">
            <text:p>1926-00</text:p>
          </table:table-cell>
          <table:table-cell office:value-type="string">
            <text:p>Eni Espana Comercializadora De Gas S.A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d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8"</text:p>
          </table:table-cell>
          <table:table-cell office:value-type="string">
            <text:p>1267-00</text:p>
          </table:table-cell>
          <table:table-cell office:value-type="string">
            <text:p>Eni Finance International 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f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7"</text:p>
          </table:table-cell>
          <table:table-cell office:value-type="string">
            <text:p>0829-00</text:p>
          </table:table-cell>
          <table:table-cell office:value-type="string">
            <text:p>Eni Finance USA Inc.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f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0"</text:p>
          </table:table-cell>
          <table:table-cell office:value-type="string">
            <text:p>2251-00</text:p>
          </table:table-cell>
          <table:table-cell office:value-type="string">
            <text:p>Eni Finance USA Inc.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b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9"</text:p>
          </table:table-cell>
          <table:table-cell office:value-type="string">
            <text:p>1993-00</text:p>
          </table:table-cell>
          <table:table-cell office:value-type="string">
            <text:p>eni fuel centrosud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3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8"</text:p>
          </table:table-cell>
          <table:table-cell office:value-type="string">
            <text:p>0209-00</text:p>
          </table:table-cell>
          <table:table-cell office:value-type="string">
            <text:p>eni fuel centrosud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55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0"</text:p>
          </table:table-cell>
          <table:table-cell office:value-type="string">
            <text:p>1873-00</text:p>
          </table:table-cell>
          <table:table-cell office:value-type="string">
            <text:p>eni fuel nord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c8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1"</text:p>
          </table:table-cell>
          <table:table-cell office:value-type="string">
            <text:p>0585-00</text:p>
          </table:table-cell>
          <table:table-cell office:value-type="string">
            <text:p>Eni Fuel S.p.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585</text:p>
          </table:table-cell>
          <table:table-cell office:value-type="string">
            <text:p>39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6"</text:p>
          </table:table-cell>
          <table:table-cell office:value-type="string">
            <text:p>2264-00</text:p>
          </table:table-cell>
          <table:table-cell office:value-type="string">
            <text:p>Eni Gabon 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7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9"</text:p>
          </table:table-cell>
          <table:table-cell office:value-type="string">
            <text:p>2135-00</text:p>
          </table:table-cell>
          <table:table-cell office:value-type="string">
            <text:p>eni gas &amp; power France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b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8"</text:p>
          </table:table-cell>
          <table:table-cell office:value-type="string">
            <text:p>1383-00</text:p>
          </table:table-cell>
          <table:table-cell office:value-type="string">
            <text:p>Eni Gas e Luc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383</text:p>
          </table:table-cell>
          <table:table-cell office:value-type="string">
            <text:p>0b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6"</text:p>
          </table:table-cell>
          <table:table-cell office:value-type="string">
            <text:p>2416-00</text:p>
          </table:table-cell>
          <table:table-cell office:value-type="string">
            <text:p>Eni Gas Transport Service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16</text:p>
          </table:table-cell>
          <table:table-cell office:value-type="string">
            <text:p>fa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0"</text:p>
          </table:table-cell>
          <table:table-cell office:value-type="string">
            <text:p>0213-10</text:p>
          </table:table-cell>
          <table:table-cell office:value-type="string">
            <text:p>Eni Gas Transport Services S.r.l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0d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5"</text:p>
          </table:table-cell>
          <table:table-cell office:value-type="string">
            <text:p>2260-00</text:p>
          </table:table-cell>
          <table:table-cell office:value-type="string">
            <text:p>Eni Ghana Exploration and Production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6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1"</text:p>
          </table:table-cell>
          <table:table-cell office:value-type="string">
            <text:p>2569-00</text:p>
          </table:table-cell>
          <table:table-cell office:value-type="string">
            <text:p>ENI GLOBAL ENERGY MARKET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69</text:p>
          </table:table-cell>
          <table:table-cell office:value-type="string">
            <text:p>d2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3"</text:p>
          </table:table-cell>
          <table:table-cell office:value-type="string">
            <text:p>1425-00</text:p>
          </table:table-cell>
          <table:table-cell office:value-type="string">
            <text:p>Eni Hewett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8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6"</text:p>
          </table:table-cell>
          <table:table-cell office:value-type="string">
            <text:p>2208-00</text:p>
          </table:table-cell>
          <table:table-cell office:value-type="string">
            <text:p>Eni Hewett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0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6"</text:p>
          </table:table-cell>
          <table:table-cell office:value-type="string">
            <text:p>2890-00</text:p>
          </table:table-cell>
          <table:table-cell office:value-type="string">
            <text:p>Eni In Amenas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e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0"</text:p>
          </table:table-cell>
          <table:table-cell office:value-type="string">
            <text:p>2923-00</text:p>
          </table:table-cell>
          <table:table-cell office:value-type="string">
            <text:p>Eni In Salah Gas Service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6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8"</text:p>
          </table:table-cell>
          <table:table-cell office:value-type="string">
            <text:p>0800-13</text:p>
          </table:table-cell>
          <table:table-cell office:value-type="string">
            <text:p>Eni India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90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8"</text:p>
          </table:table-cell>
          <table:table-cell office:value-type="string">
            <text:p>0761-00</text:p>
          </table:table-cell>
          <table:table-cell office:value-type="string">
            <text:p>Eni India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8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8"</text:p>
          </table:table-cell>
          <table:table-cell office:value-type="string">
            <text:p>1607-00</text:p>
          </table:table-cell>
          <table:table-cell office:value-type="string">
            <text:p>Eni Indonesia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0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2"</text:p>
          </table:table-cell>
          <table:table-cell office:value-type="string">
            <text:p>2341-00</text:p>
          </table:table-cell>
          <table:table-cell office:value-type="string">
            <text:p>Eni Industrial Evolution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341</text:p>
          </table:table-cell>
          <table:table-cell office:value-type="string">
            <text:p>c9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1"</text:p>
          </table:table-cell>
          <table:table-cell office:value-type="string">
            <text:p>02625-00</text:p>
          </table:table-cell>
          <table:table-cell office:value-type="string">
            <text:p>Eni Industrial Evolution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5</text:p>
          </table:table-cell>
          <table:table-cell office:value-type="string">
            <text:p>03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4"</text:p>
          </table:table-cell>
          <table:table-cell office:value-type="string">
            <text:p>2058-00</text:p>
          </table:table-cell>
          <table:table-cell office:value-type="string">
            <text:p>eni insuranc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8d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3"</text:p>
          </table:table-cell>
          <table:table-cell office:value-type="string">
            <text:p>2650-00</text:p>
          </table:table-cell>
          <table:table-cell office:value-type="string">
            <text:p>ENI INSURANCE DESIGNATED ACTIVITY COMPANY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50</text:p>
          </table:table-cell>
          <table:table-cell office:value-type="string">
            <text:p>60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8"</text:p>
          </table:table-cell>
          <table:table-cell office:value-type="string">
            <text:p>2058-00</text:p>
          </table:table-cell>
          <table:table-cell office:value-type="string">
            <text:p>ENI INSURANCE DESIGNATED ACTIVITY COMPANY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6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7"</text:p>
          </table:table-cell>
          <table:table-cell office:value-type="string">
            <text:p>2991-00</text:p>
          </table:table-cell>
          <table:table-cell office:value-type="string">
            <text:p>Eni Insuranc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9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7"</text:p>
          </table:table-cell>
          <table:table-cell office:value-type="string">
            <text:p>0197-00</text:p>
          </table:table-cell>
          <table:table-cell office:value-type="string">
            <text:p>Eni International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421</text:p>
          </table:table-cell>
          <table:table-cell office:value-type="string">
            <text:p>41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6"</text:p>
          </table:table-cell>
          <table:table-cell office:value-type="string">
            <text:p>1161-00</text:p>
          </table:table-cell>
          <table:table-cell office:value-type="string">
            <text:p>Eni International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0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7"</text:p>
          </table:table-cell>
          <table:table-cell office:value-type="string">
            <text:p>2132-00</text:p>
          </table:table-cell>
          <table:table-cell office:value-type="string">
            <text:p>Eni International Resources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1d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3"</text:p>
          </table:table-cell>
          <table:table-cell office:value-type="string">
            <text:p>1764-00</text:p>
          </table:table-cell>
          <table:table-cell office:value-type="string">
            <text:p>Eni International Resources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8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7"</text:p>
          </table:table-cell>
          <table:table-cell office:value-type="float" office:value="1243">
            <text:p>1243</text:p>
          </table:table-cell>
          <table:table-cell office:value-type="string">
            <text:p>Eni Iran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243</text:p>
          </table:table-cell>
          <table:table-cell office:value-type="string">
            <text:p>a5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7"</text:p>
          </table:table-cell>
          <table:table-cell office:value-type="string">
            <text:p>1260-00</text:p>
          </table:table-cell>
          <table:table-cell office:value-type="string">
            <text:p>Eni Iran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e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4"</text:p>
          </table:table-cell>
          <table:table-cell office:value-type="string">
            <text:p>2259-00</text:p>
          </table:table-cell>
          <table:table-cell office:value-type="string">
            <text:p>Eni Iraq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4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6"</text:p>
          </table:table-cell>
          <table:table-cell office:value-type="string">
            <text:p>2594-00</text:p>
          </table:table-cell>
          <table:table-cell office:value-type="string">
            <text:p>Eni Ireland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4</text:p>
          </table:table-cell>
          <table:table-cell office:value-type="string">
            <text:p>ca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5"</text:p>
          </table:table-cell>
          <table:table-cell office:value-type="string">
            <text:p>1367-00</text:p>
          </table:table-cell>
          <table:table-cell office:value-type="string">
            <text:p>Eni Ireland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3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7"</text:p>
          </table:table-cell>
          <table:table-cell office:value-type="string">
            <text:p>2892-00</text:p>
          </table:table-cell>
          <table:table-cell office:value-type="string">
            <text:p>Eni IS Exploration Limited 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1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9"</text:p>
          </table:table-cell>
          <table:table-cell office:value-type="string">
            <text:p>2448-00</text:p>
          </table:table-cell>
          <table:table-cell office:value-type="string">
            <text:p>Eni Isatay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6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1"</text:p>
          </table:table-cell>
          <table:table-cell office:value-type="string">
            <text:p>2140-00</text:p>
          </table:table-cell>
          <table:table-cell office:value-type="string">
            <text:p>Eni JPDA 06-105 Pty. Ltd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3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9"</text:p>
          </table:table-cell>
          <table:table-cell office:value-type="string">
            <text:p>2402-00</text:p>
          </table:table-cell>
          <table:table-cell office:value-type="string">
            <text:p>Eni Keny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9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9"</text:p>
          </table:table-cell>
          <table:table-cell office:value-type="string">
            <text:p>1743-00</text:p>
          </table:table-cell>
          <table:table-cell office:value-type="string">
            <text:p>Eni Lasmo plc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743</text:p>
          </table:table-cell>
          <table:table-cell office:value-type="string">
            <text:p>f2ce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7"</text:p>
          </table:table-cell>
          <table:table-cell office:value-type="string">
            <text:p>1559-00</text:p>
          </table:table-cell>
          <table:table-cell office:value-type="string">
            <text:p>Eni Lasmo pl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7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5"</text:p>
          </table:table-cell>
          <table:table-cell office:value-type="string">
            <text:p>1496-00</text:p>
          </table:table-cell>
          <table:table-cell office:value-type="string">
            <text:p>Eni Liverpool Bay Operating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b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5"</text:p>
          </table:table-cell>
          <table:table-cell office:value-type="string">
            <text:p>0585-01</text:p>
          </table:table-cell>
          <table:table-cell office:value-type="string">
            <text:p>Eni Maroc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2d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5"</text:p>
          </table:table-cell>
          <table:table-cell office:value-type="string">
            <text:p>2466-00</text:p>
          </table:table-cell>
          <table:table-cell office:value-type="string">
            <text:p>Eni Maroc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bb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8"</text:p>
          </table:table-cell>
          <table:table-cell office:value-type="string">
            <text:p>0580-00</text:p>
          </table:table-cell>
          <table:table-cell office:value-type="string">
            <text:p>Eni Mediterranea Idrocarburi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384</text:p>
          </table:table-cell>
          <table:table-cell office:value-type="string">
            <text:p>d8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0"</text:p>
          </table:table-cell>
          <table:table-cell table:style-name="ce3" office:value-type="date" office:date-value="2213-05-01">
            <text:p>2213-05</text:p>
          </table:table-cell>
          <table:table-cell office:value-type="string">
            <text:p>Eni Mediterranea Idrocarburi Sp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87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3"</text:p>
          </table:table-cell>
          <table:table-cell office:value-type="string">
            <text:p>2592-00</text:p>
          </table:table-cell>
          <table:table-cell office:value-type="string">
            <text:p>Eni México, S.de R.L. de C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2</text:p>
          </table:table-cell>
          <table:table-cell office:value-type="string">
            <text:p>2a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3"</text:p>
          </table:table-cell>
          <table:table-cell office:value-type="string">
            <text:p>2461-00</text:p>
          </table:table-cell>
          <table:table-cell office:value-type="string">
            <text:p>Eni México, S.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e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0"</text:p>
          </table:table-cell>
          <table:table-cell office:value-type="string">
            <text:p>1617-00</text:p>
          </table:table-cell>
          <table:table-cell office:value-type="string">
            <text:p>Eni Middle East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c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4"</text:p>
          </table:table-cell>
          <table:table-cell office:value-type="string">
            <text:p>2462-00</text:p>
          </table:table-cell>
          <table:table-cell office:value-type="string">
            <text:p>Eni Montenegro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b5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2"</text:p>
          </table:table-cell>
          <table:table-cell office:value-type="string">
            <text:p>0800-11</text:p>
          </table:table-cell>
          <table:table-cell office:value-type="string">
            <text:p>Eni Mosc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1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18"</text:p>
          </table:table-cell>
          <table:table-cell office:value-type="string">
            <text:p>2409-00</text:p>
          </table:table-cell>
          <table:table-cell office:value-type="string">
            <text:p>Eni Mozambico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09</text:p>
          </table:table-cell>
          <table:table-cell office:value-type="string">
            <text:p>89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7"</text:p>
          </table:table-cell>
          <table:table-cell office:value-type="string">
            <text:p>2442-00</text:p>
          </table:table-cell>
          <table:table-cell office:value-type="string">
            <text:p>Eni Mozambique Engineering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3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6"</text:p>
          </table:table-cell>
          <table:table-cell office:value-type="string">
            <text:p>1910-00</text:p>
          </table:table-cell>
          <table:table-cell office:value-type="string">
            <text:p>Eni Muara Bakau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b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1"</text:p>
          </table:table-cell>
          <table:table-cell office:value-type="string">
            <text:p>2424-00</text:p>
          </table:table-cell>
          <table:table-cell office:value-type="string">
            <text:p>Eni Myanmar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424</text:p>
          </table:table-cell>
          <table:table-cell office:value-type="string">
            <text:p>0e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2"</text:p>
          </table:table-cell>
          <table:table-cell office:value-type="string">
            <text:p>2421-00</text:p>
          </table:table-cell>
          <table:table-cell office:value-type="string">
            <text:p>Eni Myanmar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e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8"</text:p>
          </table:table-cell>
          <table:table-cell office:value-type="string">
            <text:p>3069-00</text:p>
          </table:table-cell>
          <table:table-cell office:value-type="string">
            <text:p>Eni Natural Energies Congo SAU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d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5"</text:p>
          </table:table-cell>
          <table:table-cell office:value-type="string">
            <text:p>3060-00</text:p>
          </table:table-cell>
          <table:table-cell office:value-type="string">
            <text:p>Eni Natural Energies Côte d'Ivoire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9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6"</text:p>
          </table:table-cell>
          <table:table-cell office:value-type="string">
            <text:p>3067-00</text:p>
          </table:table-cell>
          <table:table-cell office:value-type="string">
            <text:p>Eni Natural Energies Kenya EPZ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a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1"</text:p>
          </table:table-cell>
          <table:table-cell office:value-type="string">
            <text:p>2980-00</text:p>
          </table:table-cell>
          <table:table-cell office:value-type="string">
            <text:p>Eni Natural Energies Mozambico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8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7"</text:p>
          </table:table-cell>
          <table:table-cell office:value-type="string">
            <text:p>2684-00</text:p>
          </table:table-cell>
          <table:table-cell office:value-type="string">
            <text:p>Eni Natural Energie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84</text:p>
          </table:table-cell>
          <table:table-cell office:value-type="string">
            <text:p>d6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4"</text:p>
          </table:table-cell>
          <table:table-cell office:value-type="string">
            <text:p>2958-00</text:p>
          </table:table-cell>
          <table:table-cell office:value-type="string">
            <text:p>Eni Natural Energies Vietnam LL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f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6"</text:p>
          </table:table-cell>
          <table:table-cell office:value-type="string">
            <text:p>3013-00</text:p>
          </table:table-cell>
          <table:table-cell office:value-type="string">
            <text:p>Eni Netherlands CCUS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3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3"</text:p>
          </table:table-cell>
          <table:table-cell office:value-type="string">
            <text:p>1531-00</text:p>
          </table:table-cell>
          <table:table-cell office:value-type="string">
            <text:p>Eni New Energy Pakistan (Private)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5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9"</text:p>
          </table:table-cell>
          <table:table-cell office:value-type="string">
            <text:p>2544-00</text:p>
          </table:table-cell>
          <table:table-cell office:value-type="string">
            <text:p>Eni New Energy Pakistan (Private)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8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2"</text:p>
          </table:table-cell>
          <table:table-cell office:value-type="string">
            <text:p>2477-00</text:p>
          </table:table-cell>
          <table:table-cell office:value-type="string">
            <text:p>Eni New Energy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77</text:p>
          </table:table-cell>
          <table:table-cell office:value-type="string">
            <text:p>cb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7"</text:p>
          </table:table-cell>
          <table:table-cell office:value-type="string">
            <text:p>2570-00</text:p>
          </table:table-cell>
          <table:table-cell office:value-type="string">
            <text:p>Eni New Energy US Inc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c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4"</text:p>
          </table:table-cell>
          <table:table-cell office:value-type="string">
            <text:p>2508-00</text:p>
          </table:table-cell>
          <table:table-cell office:value-type="string">
            <text:p>Eni Next LL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f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4"</text:p>
          </table:table-cell>
          <table:table-cell office:value-type="string">
            <text:p>1230-00</text:p>
          </table:table-cell>
          <table:table-cell office:value-type="string">
            <text:p>Eni North Afric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9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8"</text:p>
          </table:table-cell>
          <table:table-cell office:value-type="string">
            <text:p>2483-00</text:p>
          </table:table-cell>
          <table:table-cell office:value-type="string">
            <text:p>Eni Oman BV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6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1"</text:p>
          </table:table-cell>
          <table:table-cell office:value-type="string">
            <text:p>2771-00</text:p>
          </table:table-cell>
          <table:table-cell office:value-type="string">
            <text:p>Eni Pakistan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71</text:p>
          </table:table-cell>
          <table:table-cell office:value-type="string">
            <text:p>f8ce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9"</text:p>
          </table:table-cell>
          <table:table-cell office:value-type="string">
            <text:p>1610-00</text:p>
          </table:table-cell>
          <table:table-cell office:value-type="string">
            <text:p>Eni Pakistan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8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9"</text:p>
          </table:table-cell>
          <table:table-cell office:value-type="string">
            <text:p>2610-00</text:p>
          </table:table-cell>
          <table:table-cell office:value-type="string">
            <text:p>Eni Plenitude Iberia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f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4"</text:p>
          </table:table-cell>
          <table:table-cell office:value-type="string">
            <text:p>2724-00</text:p>
          </table:table-cell>
          <table:table-cell office:value-type="string">
            <text:p>ENI PLENITUDE RENEWABLES AUSTRALIA PTY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c9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8"</text:p>
          </table:table-cell>
          <table:table-cell office:value-type="string">
            <text:p>2696-00</text:p>
          </table:table-cell>
          <table:table-cell office:value-type="string">
            <text:p>Eni Plenitude Renewables France SA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d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5"</text:p>
          </table:table-cell>
          <table:table-cell office:value-type="string">
            <text:p>2736-00</text:p>
          </table:table-cell>
          <table:table-cell office:value-type="string">
            <text:p>ENI PLENITUDE RENEWABLES HELLAS SINGLE MEMBER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0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0"</text:p>
          </table:table-cell>
          <table:table-cell office:value-type="string">
            <text:p>2477-00</text:p>
          </table:table-cell>
          <table:table-cell office:value-type="string">
            <text:p>Eni Plenitude Renewables Italy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4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7"</text:p>
          </table:table-cell>
          <table:table-cell office:value-type="string">
            <text:p>2661-00</text:p>
          </table:table-cell>
          <table:table-cell office:value-type="string">
            <text:p>Eni Plenitude Renewables Spain SLU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5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9"</text:p>
          </table:table-cell>
          <table:table-cell office:value-type="float" office:value="9999">
            <text:p>9999</text:p>
          </table:table-cell>
          <table:table-cell office:value-type="string">
            <text:p>Eni Plenitude S.p.A. Società Benefit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db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4"</text:p>
          </table:table-cell>
          <table:table-cell office:value-type="string">
            <text:p>1383-00</text:p>
          </table:table-cell>
          <table:table-cell office:value-type="string">
            <text:p>Eni Plenitude S.p.A. Società Benefit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383</text:p>
          </table:table-cell>
          <table:table-cell office:value-type="string">
            <text:p>2b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5"</text:p>
          </table:table-cell>
          <table:table-cell office:value-type="string">
            <text:p>2803-00</text:p>
          </table:table-cell>
          <table:table-cell office:value-type="string">
            <text:p>Eni Plenitude Technical Services Colombia S.A.S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d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8"</text:p>
          </table:table-cell>
          <table:table-cell office:value-type="string">
            <text:p>2797-00</text:p>
          </table:table-cell>
          <table:table-cell office:value-type="string">
            <text:p>ENI PLENITUDE TECHNICAL SERVICE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4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7"</text:p>
          </table:table-cell>
          <table:table-cell office:value-type="string">
            <text:p>2796-00</text:p>
          </table:table-cell>
          <table:table-cell office:value-type="string">
            <text:p>ENI PLENITUDE WIND &amp; ENERGY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2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7"</text:p>
          </table:table-cell>
          <table:table-cell office:value-type="string">
            <text:p>02563-00</text:p>
          </table:table-cell>
          <table:table-cell office:value-type="string">
            <text:p>Eni Portugal B.V.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63U000</text:p>
          </table:table-cell>
          <table:table-cell office:value-type="string">
            <text:p>20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8"</text:p>
          </table:table-cell>
          <table:table-cell office:value-type="string">
            <text:p>2445-00</text:p>
          </table:table-cell>
          <table:table-cell office:value-type="string">
            <text:p>Eni Portugal B.V.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4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2"</text:p>
          </table:table-cell>
          <table:table-cell office:value-type="string">
            <text:p>2617-00</text:p>
          </table:table-cell>
          <table:table-cell office:value-type="string">
            <text:p>Eni Qatar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4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5"</text:p>
          </table:table-cell>
          <table:table-cell office:value-type="string">
            <text:p>0439-00</text:p>
          </table:table-cell>
          <table:table-cell office:value-type="string">
            <text:p>Eni RAK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7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2"</text:p>
          </table:table-cell>
          <table:table-cell office:value-type="string">
            <text:p>2551-00</text:p>
          </table:table-cell>
          <table:table-cell office:value-type="string">
            <text:p>Eni RAK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b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21"</text:p>
          </table:table-cell>
          <table:table-cell office:value-type="string">
            <text:p>2926-00</text:p>
          </table:table-cell>
          <table:table-cell office:value-type="string">
            <text:p>Eni Rapak Deepwater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7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16"</text:p>
          </table:table-cell>
          <table:table-cell office:value-type="string">
            <text:p>1757-00</text:p>
          </table:table-cell>
          <table:table-cell office:value-type="string">
            <text:p>eni rete oil&amp;nonoil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70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8"</text:p>
          </table:table-cell>
          <table:table-cell office:value-type="string">
            <text:p>0585-00</text:p>
          </table:table-cell>
          <table:table-cell office:value-type="string">
            <text:p>eni rete oil&amp;nonoil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a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1"</text:p>
          </table:table-cell>
          <table:table-cell office:value-type="string">
            <text:p>2768-00</text:p>
          </table:table-cell>
          <table:table-cell office:value-type="string">
            <text:p>Eni Rewind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68</text:p>
          </table:table-cell>
          <table:table-cell office:value-type="string">
            <text:p>dc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2"</text:p>
          </table:table-cell>
          <table:table-cell office:value-type="string">
            <text:p>0301-00</text:p>
          </table:table-cell>
          <table:table-cell office:value-type="string">
            <text:p>Eni Rewind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828</text:p>
          </table:table-cell>
          <table:table-cell office:value-type="string">
            <text:p>af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3"</text:p>
          </table:table-cell>
          <table:table-cell office:value-type="string">
            <text:p>0960-01</text:p>
          </table:table-cell>
          <table:table-cell office:value-type="string">
            <text:p>Eni Rovuma Basin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d1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2"</text:p>
          </table:table-cell>
          <table:table-cell office:value-type="string">
            <text:p>2493-00</text:p>
          </table:table-cell>
          <table:table-cell office:value-type="string">
            <text:p>Eni Rovuma Basin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8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2"</text:p>
          </table:table-cell>
          <table:table-cell office:value-type="string">
            <text:p>0800-00</text:p>
          </table:table-cell>
          <table:table-cell office:value-type="string">
            <text:p>En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47</text:p>
          </table:table-cell>
          <table:table-cell office:value-type="string">
            <text:p>44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4"</text:p>
          </table:table-cell>
          <table:table-cell office:value-type="string">
            <text:p>0800-01</text:p>
          </table:table-cell>
          <table:table-cell office:value-type="string">
            <text:p>Eni S.p.A. - CORPORAT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47</text:p>
          </table:table-cell>
          <table:table-cell office:value-type="string">
            <text:p>97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4"</text:p>
          </table:table-cell>
          <table:table-cell office:value-type="string">
            <text:p>0800-02</text:p>
          </table:table-cell>
          <table:table-cell office:value-type="string">
            <text:p>Eni S.p.A. - Div. E&amp;P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001</text:p>
          </table:table-cell>
          <table:table-cell office:value-type="string">
            <text:p>df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6"</text:p>
          </table:table-cell>
          <table:table-cell office:value-type="string">
            <text:p>0800-04</text:p>
          </table:table-cell>
          <table:table-cell office:value-type="string">
            <text:p>Eni S.p.A. - Div. R&amp;M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32</text:p>
          </table:table-cell>
          <table:table-cell office:value-type="string">
            <text:p>12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0"</text:p>
          </table:table-cell>
          <table:table-cell office:value-type="string">
            <text:p>2739-00</text:p>
          </table:table-cell>
          <table:table-cell office:value-type="string">
            <text:p>Eni Sharjah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39</text:p>
          </table:table-cell>
          <table:table-cell office:value-type="string">
            <text:p>e2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7"</text:p>
          </table:table-cell>
          <table:table-cell office:value-type="string">
            <text:p>2538-00</text:p>
          </table:table-cell>
          <table:table-cell office:value-type="string">
            <text:p>Eni Sharjah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d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5"</text:p>
          </table:table-cell>
          <table:table-cell office:value-type="string">
            <text:p>1575-00</text:p>
          </table:table-cell>
          <table:table-cell office:value-type="string">
            <text:p>Eni South Africa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14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6"</text:p>
          </table:table-cell>
          <table:table-cell office:value-type="string">
            <text:p>2439-00</text:p>
          </table:table-cell>
          <table:table-cell office:value-type="string">
            <text:p>Eni South Afric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9f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3"</text:p>
          </table:table-cell>
          <table:table-cell office:value-type="string">
            <text:p>2598-00</text:p>
          </table:table-cell>
          <table:table-cell office:value-type="string">
            <text:p>Eni Sustainable Mobility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98</text:p>
          </table:table-cell>
          <table:table-cell office:value-type="string">
            <text:p>b8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5"</text:p>
          </table:table-cell>
          <table:table-cell office:value-type="string">
            <text:p>3004-00</text:p>
          </table:table-cell>
          <table:table-cell office:value-type="string">
            <text:p>Eni Tellus CCS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2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5"</text:p>
          </table:table-cell>
          <table:table-cell office:value-type="string">
            <text:p>0407-00</text:p>
          </table:table-cell>
          <table:table-cell office:value-type="string">
            <text:p>eni timor lest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060</text:p>
          </table:table-cell>
          <table:table-cell office:value-type="string">
            <text:p>d4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5"</text:p>
          </table:table-cell>
          <table:table-cell office:value-type="string">
            <text:p>0315-00</text:p>
          </table:table-cell>
          <table:table-cell office:value-type="string">
            <text:p>Eni Timor Leste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0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9"</text:p>
          </table:table-cell>
          <table:table-cell office:value-type="string">
            <text:p>0407-00</text:p>
          </table:table-cell>
          <table:table-cell office:value-type="string">
            <text:p>Eni Timor Lest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5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0"</text:p>
          </table:table-cell>
          <table:table-cell office:value-type="string">
            <text:p>2494-00</text:p>
          </table:table-cell>
          <table:table-cell office:value-type="string">
            <text:p>ENI TRADE &amp; BIOFUELS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8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4"</text:p>
          </table:table-cell>
          <table:table-cell office:value-type="string">
            <text:p>2579-00</text:p>
          </table:table-cell>
          <table:table-cell office:value-type="string">
            <text:p>ENI TRADE &amp; BIOFUELS SP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79</text:p>
          </table:table-cell>
          <table:table-cell office:value-type="string">
            <text:p>d2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0"</text:p>
          </table:table-cell>
          <table:table-cell office:value-type="string">
            <text:p>0456-00</text:p>
          </table:table-cell>
          <table:table-cell office:value-type="string">
            <text:p>Eni Trading &amp; Shipping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132</text:p>
          </table:table-cell>
          <table:table-cell office:value-type="string">
            <text:p>32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7"</text:p>
          </table:table-cell>
          <table:table-cell office:value-type="string">
            <text:p>2217-00</text:p>
          </table:table-cell>
          <table:table-cell office:value-type="string">
            <text:p>Eni trading&amp;shipping In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4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2"</text:p>
          </table:table-cell>
          <table:table-cell office:value-type="string">
            <text:p>0456-00</text:p>
          </table:table-cell>
          <table:table-cell office:value-type="string">
            <text:p>eni trading&amp;shipping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a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6"</text:p>
          </table:table-cell>
          <table:table-cell office:value-type="string">
            <text:p>2514-00</text:p>
          </table:table-cell>
          <table:table-cell office:value-type="string">
            <text:p>Eni Transporte y Suministro México, S. 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4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1"</text:p>
          </table:table-cell>
          <table:table-cell office:value-type="string">
            <text:p>1213-00</text:p>
          </table:table-cell>
          <table:table-cell office:value-type="string">
            <text:p>Eni Tunisi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a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3"</text:p>
          </table:table-cell>
          <table:table-cell office:value-type="string">
            <text:p>2177-00</text:p>
          </table:table-cell>
          <table:table-cell office:value-type="string">
            <text:p>Eni Turkmenistan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9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0"</text:p>
          </table:table-cell>
          <table:table-cell office:value-type="string">
            <text:p>0010-00</text:p>
          </table:table-cell>
          <table:table-cell office:value-type="string">
            <text:p>Eni UK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c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7"</text:p>
          </table:table-cell>
          <table:table-cell office:value-type="string">
            <text:p>0010-00</text:p>
          </table:table-cell>
          <table:table-cell office:value-type="string">
            <text:p>Eni UK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7ce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9"</text:p>
          </table:table-cell>
          <table:table-cell office:value-type="float" office:value="2576">
            <text:p>2576</text:p>
          </table:table-cell>
          <table:table-cell office:value-type="string">
            <text:p>Eni Ukraine LLC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76</text:p>
          </table:table-cell>
          <table:table-cell office:value-type="string">
            <text:p>ff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2"</text:p>
          </table:table-cell>
          <table:table-cell office:value-type="string">
            <text:p>2319-00</text:p>
          </table:table-cell>
          <table:table-cell office:value-type="string">
            <text:p>Eni Ukraine LLC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2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5"</text:p>
          </table:table-cell>
          <table:table-cell office:value-type="string">
            <text:p>0800-24</text:p>
          </table:table-cell>
          <table:table-cell office:value-type="string">
            <text:p>Eni US Operating Co. Inc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4e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0"</text:p>
          </table:table-cell>
          <table:table-cell office:value-type="string">
            <text:p>1961-00</text:p>
          </table:table-cell>
          <table:table-cell office:value-type="string">
            <text:p>Eni US Operating Co. Inc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f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7"</text:p>
          </table:table-cell>
          <table:table-cell office:value-type="string">
            <text:p>0745-00</text:p>
          </table:table-cell>
          <table:table-cell office:value-type="string">
            <text:p>Eni USA R&amp;M Co. Inc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5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7"</text:p>
          </table:table-cell>
          <table:table-cell office:value-type="string">
            <text:p>1378-00</text:p>
          </table:table-cell>
          <table:table-cell office:value-type="string">
            <text:p>Eni Venezuela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8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3"</text:p>
          </table:table-cell>
          <table:table-cell office:value-type="string">
            <text:p>0800-03</text:p>
          </table:table-cell>
          <table:table-cell office:value-type="string">
            <text:p>Eni Vietnam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035</text:p>
          </table:table-cell>
          <table:table-cell office:value-type="string">
            <text:p>06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5"</text:p>
          </table:table-cell>
          <table:table-cell office:value-type="string">
            <text:p>2346-00</text:p>
          </table:table-cell>
          <table:table-cell office:value-type="string">
            <text:p>Eni Vietnam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5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4"</text:p>
          </table:table-cell>
          <table:table-cell office:value-type="string">
            <text:p>2341-00</text:p>
          </table:table-cell>
          <table:table-cell office:value-type="string">
            <text:p>eni west afric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341</text:p>
          </table:table-cell>
          <table:table-cell office:value-type="string">
            <text:p>13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7"</text:p>
          </table:table-cell>
          <table:table-cell office:value-type="string">
            <text:p>2281-00</text:p>
          </table:table-cell>
          <table:table-cell office:value-type="string">
            <text:p>eni zubair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281</text:p>
          </table:table-cell>
          <table:table-cell office:value-type="string">
            <text:p>fe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4"</text:p>
          </table:table-cell>
          <table:table-cell office:value-type="string">
            <text:p>030X-00</text:p>
          </table:table-cell>
          <table:table-cell office:value-type="string">
            <text:p>eni Zubair S.p.A. - IN LIQUIDAZIONE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828</text:p>
          </table:table-cell>
          <table:table-cell office:value-type="string">
            <text:p>fa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8"</text:p>
          </table:table-cell>
          <table:table-cell office:value-type="string">
            <text:p>2281-00</text:p>
          </table:table-cell>
          <table:table-cell office:value-type="string">
            <text:p>eni Zubair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e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6"</text:p>
          </table:table-cell>
          <table:table-cell office:value-type="string">
            <text:p>2598-00</text:p>
          </table:table-cell>
          <table:table-cell office:value-type="string">
            <text:p>Eni4Citie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98U000</text:p>
          </table:table-cell>
          <table:table-cell office:value-type="string">
            <text:p>62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5"</text:p>
          </table:table-cell>
          <table:table-cell office:value-type="string">
            <text:p>2613-00</text:p>
          </table:table-cell>
          <table:table-cell office:value-type="string">
            <text:p>ENIBIOCH4IN APRILIA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13</text:p>
          </table:table-cell>
          <table:table-cell office:value-type="string">
            <text:p>61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8"</text:p>
          </table:table-cell>
          <table:table-cell office:value-type="string">
            <text:p>2609-00</text:p>
          </table:table-cell>
          <table:table-cell office:value-type="string">
            <text:p>ENIBIOCH4IN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09</text:p>
          </table:table-cell>
          <table:table-cell office:value-type="string">
            <text:p>c6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9"</text:p>
          </table:table-cell>
          <table:table-cell office:value-type="string">
            <text:p>2612-00</text:p>
          </table:table-cell>
          <table:table-cell office:value-type="string">
            <text:p>ENIBIOCH4IN Service BioGa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12</text:p>
          </table:table-cell>
          <table:table-cell office:value-type="string">
            <text:p>d9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4"</text:p>
          </table:table-cell>
          <table:table-cell office:value-type="string">
            <text:p>1141-00</text:p>
          </table:table-cell>
          <table:table-cell office:value-type="string">
            <text:p>ENILIVE AUSTRIA GMBH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b1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5"</text:p>
          </table:table-cell>
          <table:table-cell office:value-type="string">
            <text:p>0029-00</text:p>
          </table:table-cell>
          <table:table-cell office:value-type="string">
            <text:p>ENILIVE AUSTRIA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2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5"</text:p>
          </table:table-cell>
          <table:table-cell office:value-type="string">
            <text:p>0719-00</text:p>
          </table:table-cell>
          <table:table-cell office:value-type="string">
            <text:p>ENILIVE BENELUX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f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4"</text:p>
          </table:table-cell>
          <table:table-cell office:value-type="string">
            <text:p>2644-00</text:p>
          </table:table-cell>
          <table:table-cell office:value-type="string">
            <text:p>ENILIVE DEUTSCHLAND GMBH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44</text:p>
          </table:table-cell>
          <table:table-cell office:value-type="string">
            <text:p>bc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6"</text:p>
          </table:table-cell>
          <table:table-cell office:value-type="string">
            <text:p>0821-00</text:p>
          </table:table-cell>
          <table:table-cell office:value-type="string">
            <text:p>ENILIVE DEUTSCHLAND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61</text:p>
          </table:table-cell>
          <table:table-cell office:value-type="string">
            <text:p>d5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9"</text:p>
          </table:table-cell>
          <table:table-cell office:value-type="string">
            <text:p>8054-00</text:p>
          </table:table-cell>
          <table:table-cell office:value-type="string">
            <text:p>Enilive Franc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c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3"</text:p>
          </table:table-cell>
          <table:table-cell office:value-type="string">
            <text:p>8054-00</text:p>
          </table:table-cell>
          <table:table-cell office:value-type="string">
            <text:p>ENILIVE FRANCE SA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7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2"</text:p>
          </table:table-cell>
          <table:table-cell office:value-type="string">
            <text:p>1748-00</text:p>
          </table:table-cell>
          <table:table-cell office:value-type="string">
            <text:p>ENILIVE IBERIA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7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6"</text:p>
          </table:table-cell>
          <table:table-cell office:value-type="string">
            <text:p>0213-00</text:p>
          </table:table-cell>
          <table:table-cell office:value-type="string">
            <text:p>ENILIVE MARKETING AUSTRIA GMBH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734</text:p>
          </table:table-cell>
          <table:table-cell office:value-type="string">
            <text:p>fd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0"</text:p>
          </table:table-cell>
          <table:table-cell office:value-type="string">
            <text:p>2285-00</text:p>
          </table:table-cell>
          <table:table-cell office:value-type="string">
            <text:p>ENILIVE MARKETING AUSTRIA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0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2"</text:p>
          </table:table-cell>
          <table:table-cell office:value-type="string">
            <text:p>2598-00</text:p>
          </table:table-cell>
          <table:table-cell office:value-type="string">
            <text:p>Eniliv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98</text:p>
          </table:table-cell>
          <table:table-cell office:value-type="string">
            <text:p>98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7"</text:p>
          </table:table-cell>
          <table:table-cell office:value-type="string">
            <text:p>0823-00</text:p>
          </table:table-cell>
          <table:table-cell office:value-type="string">
            <text:p>ENILIVE SCHMIERTECHNIK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9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4"</text:p>
          </table:table-cell>
          <table:table-cell office:value-type="string">
            <text:p>0028-00</text:p>
          </table:table-cell>
          <table:table-cell office:value-type="string">
            <text:p>ENILIVE SUISSE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1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8"</text:p>
          </table:table-cell>
          <table:table-cell office:value-type="string">
            <text:p>2902-00</text:p>
          </table:table-cell>
          <table:table-cell office:value-type="string">
            <text:p>Enilive US Inc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3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9"</text:p>
          </table:table-cell>
          <table:table-cell office:value-type="string">
            <text:p>2284-00</text:p>
          </table:table-cell>
          <table:table-cell office:value-type="string">
            <text:p>ENIMOOV AUSTRIA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f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1"</text:p>
          </table:table-cell>
          <table:table-cell office:value-type="float" office:value="1188">
            <text:p>1188</text:p>
          </table:table-cell>
          <table:table-cell office:value-type="string">
            <text:p>Enimoov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89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2"</text:p>
          </table:table-cell>
          <table:table-cell office:value-type="string">
            <text:p>0585-00</text:p>
          </table:table-cell>
          <table:table-cell office:value-type="string">
            <text:p>Enimoov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585</text:p>
          </table:table-cell>
          <table:table-cell office:value-type="string">
            <text:p>10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3"</text:p>
          </table:table-cell>
          <table:table-cell office:value-type="string">
            <text:p>1536-00</text:p>
          </table:table-cell>
          <table:table-cell office:value-type="string">
            <text:p>EniPower Mantova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3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1"</text:p>
          </table:table-cell>
          <table:table-cell office:value-type="string">
            <text:p>0984-00</text:p>
          </table:table-cell>
          <table:table-cell office:value-type="string">
            <text:p>EniPower Mantov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36</text:p>
          </table:table-cell>
          <table:table-cell office:value-type="string">
            <text:p>f5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92"</text:p>
          </table:table-cell>
          <table:table-cell office:value-type="string">
            <text:p>0801-00</text:p>
          </table:table-cell>
          <table:table-cell office:value-type="string">
            <text:p>EniPower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467</text:p>
          </table:table-cell>
          <table:table-cell office:value-type="string">
            <text:p>81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2"</text:p>
          </table:table-cell>
          <table:table-cell office:value-type="string">
            <text:p>0538-00</text:p>
          </table:table-cell>
          <table:table-cell office:value-type="string">
            <text:p>EniProgetti Egypt Ltd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538</text:p>
          </table:table-cell>
          <table:table-cell office:value-type="string">
            <text:p>e7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5"</text:p>
          </table:table-cell>
          <table:table-cell office:value-type="string">
            <text:p>2194-00</text:p>
          </table:table-cell>
          <table:table-cell office:value-type="string">
            <text:p>EniProgetti Egypt Ltd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b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5"</text:p>
          </table:table-cell>
          <table:table-cell office:value-type="string">
            <text:p>0670-00</text:p>
          </table:table-cell>
          <table:table-cell office:value-type="string">
            <text:p>EniProgett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67</text:p>
          </table:table-cell>
          <table:table-cell office:value-type="string">
            <text:p>08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4"</text:p>
          </table:table-cell>
          <table:table-cell office:value-type="string">
            <text:p>0670-00</text:p>
          </table:table-cell>
          <table:table-cell office:value-type="string">
            <text:p>EniProgetti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c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4"</text:p>
          </table:table-cell>
          <table:table-cell office:value-type="string">
            <text:p>3049-00</text:p>
          </table:table-cell>
          <table:table-cell office:value-type="string">
            <text:p>Eniquantic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a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7"</text:p>
          </table:table-cell>
          <table:table-cell office:value-type="string">
            <text:p>0960-00</text:p>
          </table:table-cell>
          <table:table-cell office:value-type="string">
            <text:p>EniServiz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282</text:p>
          </table:table-cell>
          <table:table-cell office:value-type="string">
            <text:p>a7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2"</text:p>
          </table:table-cell>
          <table:table-cell office:value-type="string">
            <text:p>02623-00</text:p>
          </table:table-cell>
          <table:table-cell office:value-type="string">
            <text:p>EniServizi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3</text:p>
          </table:table-cell>
          <table:table-cell office:value-type="string">
            <text:p>db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8"</text:p>
          </table:table-cell>
          <table:table-cell office:value-type="string">
            <text:p>2601-00</text:p>
          </table:table-cell>
          <table:table-cell office:value-type="string">
            <text:p>Eniverse Ventures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01</text:p>
          </table:table-cell>
          <table:table-cell office:value-type="string">
            <text:p>6a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33"</text:p>
          </table:table-cell>
          <table:table-cell office:value-type="string">
            <text:p>2901-00</text:p>
          </table:table-cell>
          <table:table-cell office:value-type="string">
            <text:p>Enivibe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901</text:p>
          </table:table-cell>
          <table:table-cell office:value-type="string">
            <text:p>ca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9"</text:p>
          </table:table-cell>
          <table:table-cell office:value-type="float" office:value="2553">
            <text:p>2553</text:p>
          </table:table-cell>
          <table:table-cell office:value-type="string">
            <text:p>ESAIN S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53</text:p>
          </table:table-cell>
          <table:table-cell office:value-type="string">
            <text:p>86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3"</text:p>
          </table:table-cell>
          <table:table-cell office:value-type="string">
            <text:p>0575-00</text:p>
          </table:table-cell>
          <table:table-cell office:value-type="string">
            <text:p>ESAIN 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b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7"</text:p>
          </table:table-cell>
          <table:table-cell office:value-type="string">
            <text:p>2359-00</text:p>
          </table:table-cell>
          <table:table-cell office:value-type="string">
            <text:p>Est Più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7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7"</text:p>
          </table:table-cell>
          <table:table-cell office:value-type="string">
            <text:p>2577-00</text:p>
          </table:table-cell>
          <table:table-cell office:value-type="string">
            <text:p>Evolvere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77</text:p>
          </table:table-cell>
          <table:table-cell office:value-type="string">
            <text:p>0a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1"</text:p>
          </table:table-cell>
          <table:table-cell office:value-type="string">
            <text:p>2716-00</text:p>
          </table:table-cell>
          <table:table-cell office:value-type="string">
            <text:p>Finproject India Pvt.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b0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9"</text:p>
          </table:table-cell>
          <table:table-cell office:value-type="string">
            <text:p>2710-00</text:p>
          </table:table-cell>
          <table:table-cell office:value-type="string">
            <text:p>Finproject Romania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e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2"</text:p>
          </table:table-cell>
          <table:table-cell office:value-type="string">
            <text:p>2595-00</text:p>
          </table:table-cell>
          <table:table-cell office:value-type="string">
            <text:p>FINPROJECT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95</text:p>
          </table:table-cell>
          <table:table-cell office:value-type="string">
            <text:p>aa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0"</text:p>
          </table:table-cell>
          <table:table-cell office:value-type="string">
            <text:p>2712-00</text:p>
          </table:table-cell>
          <table:table-cell office:value-type="string">
            <text:p>Finproject Viet Nam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f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6"</text:p>
          </table:table-cell>
          <table:table-cell office:value-type="string">
            <text:p>0910-00</text:p>
          </table:table-cell>
          <table:table-cell office:value-type="string">
            <text:p>First Calgary Petroleums Partner Co. ULC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d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9"</text:p>
          </table:table-cell>
          <table:table-cell office:value-type="string">
            <text:p>2246-00</text:p>
          </table:table-cell>
          <table:table-cell office:value-type="string">
            <text:p>First Calgary Petroleums Partner Co. UL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a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4"</text:p>
          </table:table-cell>
          <table:table-cell office:value-type="string">
            <text:p>2432-00</text:p>
          </table:table-cell>
          <table:table-cell office:value-type="string">
            <text:p>Floater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81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6"</text:p>
          </table:table-cell>
          <table:table-cell office:value-type="string">
            <text:p>2432-00</text:p>
          </table:table-cell>
          <table:table-cell office:value-type="string">
            <text:p>FLOATERS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32</text:p>
          </table:table-cell>
          <table:table-cell office:value-type="string">
            <text:p>3f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2"</text:p>
          </table:table-cell>
          <table:table-cell office:value-type="string">
            <text:p>2720-00</text:p>
          </table:table-cell>
          <table:table-cell office:value-type="string">
            <text:p>Foam Creations (2008) Inc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b8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3"</text:p>
          </table:table-cell>
          <table:table-cell office:value-type="string">
            <text:p>2721-00</text:p>
          </table:table-cell>
          <table:table-cell office:value-type="string">
            <text:p>Foam Creations México S.A. de C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c1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2"</text:p>
          </table:table-cell>
          <table:table-cell office:value-type="string">
            <text:p>0800-05</text:p>
          </table:table-cell>
          <table:table-cell office:value-type="string">
            <text:p>Gas &amp; Lng Marketing and power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035</text:p>
          </table:table-cell>
          <table:table-cell office:value-type="string">
            <text:p>05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96"</text:p>
          </table:table-cell>
          <table:table-cell office:value-type="string">
            <text:p>1540-00</text:p>
          </table:table-cell>
          <table:table-cell office:value-type="string">
            <text:p>GAS DISTRIBUTION COMPANY OF THESSALONIKI - THESSALY S.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f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3"</text:p>
          </table:table-cell>
          <table:table-cell office:value-type="string">
            <text:p>2472-00</text:p>
          </table:table-cell>
          <table:table-cell office:value-type="string">
            <text:p>Gas Supply Company Thessaloniki-Thessalia 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99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8"</text:p>
          </table:table-cell>
          <table:table-cell office:value-type="string">
            <text:p>0800-05</text:p>
          </table:table-cell>
          <table:table-cell office:value-type="string">
            <text:p>Global Gas &amp; LNG Portf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035</text:p>
          </table:table-cell>
          <table:table-cell office:value-type="string">
            <text:p>d7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6"</text:p>
          </table:table-cell>
          <table:table-cell office:value-type="string">
            <text:p>0276-00</text:p>
          </table:table-cell>
          <table:table-cell office:value-type="string">
            <text:p>Global Natural Resources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276</text:p>
          </table:table-cell>
          <table:table-cell office:value-type="string">
            <text:p>a3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3"</text:p>
          </table:table-cell>
          <table:table-cell office:value-type="string">
            <text:p>0800-08</text:p>
          </table:table-cell>
          <table:table-cell office:value-type="string">
            <text:p>Global Natural Resource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e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3"</text:p>
          </table:table-cell>
          <table:table-cell office:value-type="string">
            <text:p>2646-00</text:p>
          </table:table-cell>
          <table:table-cell office:value-type="string">
            <text:p>Green Energy Management Service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5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6"</text:p>
          </table:table-cell>
          <table:table-cell office:value-type="string">
            <text:p>0800-04</text:p>
          </table:table-cell>
          <table:table-cell office:value-type="string">
            <text:p>Green Trad Ref.and Marketing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32</text:p>
          </table:table-cell>
          <table:table-cell office:value-type="string">
            <text:p>2e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4"</text:p>
          </table:table-cell>
          <table:table-cell office:value-type="string">
            <text:p>2770-00</text:p>
          </table:table-cell>
          <table:table-cell office:value-type="string">
            <text:p>GreenStream BV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70</text:p>
          </table:table-cell>
          <table:table-cell office:value-type="string">
            <text:p>e6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9"</text:p>
          </table:table-cell>
          <table:table-cell office:value-type="string">
            <text:p>0990-00</text:p>
          </table:table-cell>
          <table:table-cell office:value-type="string">
            <text:p>greenstream bv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5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3"</text:p>
          </table:table-cell>
          <table:table-cell office:value-type="string">
            <text:p>0990-00</text:p>
          </table:table-cell>
          <table:table-cell office:value-type="string">
            <text:p>GreenStream BV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7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6"</text:p>
          </table:table-cell>
          <table:table-cell office:value-type="string">
            <text:p>A002-00</text:p>
          </table:table-cell>
          <table:table-cell office:value-type="string">
            <text:p>Groupement Eni/Sonatrac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4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9"</text:p>
          </table:table-cell>
          <table:table-cell office:value-type="string">
            <text:p>A059-00</text:p>
          </table:table-cell>
          <table:table-cell office:value-type="string">
            <text:p>Groupement TouatGaz - GTG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e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1"</text:p>
          </table:table-cell>
          <table:table-cell office:value-type="string">
            <text:p>0008-00</text:p>
          </table:table-cell>
          <table:table-cell office:value-type="string">
            <text:p>Hindustan Oil Exploration Company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008</text:p>
          </table:table-cell>
          <table:table-cell office:value-type="string">
            <text:p>7c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4"</text:p>
          </table:table-cell>
          <table:table-cell office:value-type="string">
            <text:p>2184-00</text:p>
          </table:table-cell>
          <table:table-cell office:value-type="string">
            <text:p>Hindustan Oil Exploration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a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1"</text:p>
          </table:table-cell>
          <table:table-cell office:value-type="string">
            <text:p>1307-00</text:p>
          </table:table-cell>
          <table:table-cell office:value-type="string">
            <text:p>Ieoc Production BV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c2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8"</text:p>
          </table:table-cell>
          <table:table-cell office:value-type="string">
            <text:p>A057-00</text:p>
          </table:table-cell>
          <table:table-cell office:value-type="string">
            <text:p>In Salah - In Amenas Gas JV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c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0"</text:p>
          </table:table-cell>
          <table:table-cell office:value-type="string">
            <text:p>1987-00</text:p>
          </table:table-cell>
          <table:table-cell office:value-type="string">
            <text:p>InAgip Doo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ad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9"</text:p>
          </table:table-cell>
          <table:table-cell office:value-type="string">
            <text:p>1304-00</text:p>
          </table:table-cell>
          <table:table-cell office:value-type="string">
            <text:p>InAgip Doo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b0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9"</text:p>
          </table:table-cell>
          <table:table-cell office:value-type="string">
            <text:p>02819-00</text:p>
          </table:table-cell>
          <table:table-cell office:value-type="string">
            <text:p>Industrial Transform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819</text:p>
          </table:table-cell>
          <table:table-cell office:value-type="string">
            <text:p>b3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5"</text:p>
          </table:table-cell>
          <table:table-cell office:value-type="string">
            <text:p>0800-11</text:p>
          </table:table-cell>
          <table:table-cell office:value-type="string">
            <text:p>Industrial Transform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1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8"</text:p>
          </table:table-cell>
          <table:table-cell office:value-type="string">
            <text:p>0800-41</text:p>
          </table:table-cell>
          <table:table-cell office:value-type="string">
            <text:p>Industrial Transformation Development &amp; Technical Activities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af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4"</text:p>
          </table:table-cell>
          <table:table-cell office:value-type="string">
            <text:p>0800-10</text:p>
          </table:table-cell>
          <table:table-cell office:value-type="string">
            <text:p>Industrial Transformation Development &amp; Technical Activitie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f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8"</text:p>
          </table:table-cell>
          <table:table-cell office:value-type="string">
            <text:p>0800-42</text:p>
          </table:table-cell>
          <table:table-cell office:value-type="string">
            <text:p>ING. LUIGI CONTI VECCHI SP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c3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9"</text:p>
          </table:table-cell>
          <table:table-cell office:value-type="string">
            <text:p>0895-00</text:p>
          </table:table-cell>
          <table:table-cell office:value-type="string">
            <text:p>ING. LUIGI CONTI VECCHI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b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0"</text:p>
          </table:table-cell>
          <table:table-cell office:value-type="string">
            <text:p>2611-00</text:p>
          </table:table-cell>
          <table:table-cell office:value-type="string">
            <text:p>Instalaciones Martinez Diez,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2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3"</text:p>
          </table:table-cell>
          <table:table-cell office:value-type="string">
            <text:p>2497-00</text:p>
          </table:table-cell>
          <table:table-cell office:value-type="string">
            <text:p>Isatay Operating Company LLP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3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1"</text:p>
          </table:table-cell>
          <table:table-cell office:value-type="string">
            <text:p>3075-00</text:p>
          </table:table-cell>
          <table:table-cell office:value-type="string">
            <text:p>Ithaca Energy (UK)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f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9"</text:p>
          </table:table-cell>
          <table:table-cell office:value-type="string">
            <text:p>3071-00</text:p>
          </table:table-cell>
          <table:table-cell office:value-type="string">
            <text:p>Ithaca Energy Pl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e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8"</text:p>
          </table:table-cell>
          <table:table-cell office:value-type="string">
            <text:p>1418-00</text:p>
          </table:table-cell>
          <table:table-cell office:value-type="string">
            <text:p>Karachaganak Petroleum Operating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a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8"</text:p>
          </table:table-cell>
          <table:table-cell office:value-type="string">
            <text:p>2605-00</text:p>
          </table:table-cell>
          <table:table-cell office:value-type="string">
            <text:p>Liverpool Bay CCS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e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7"</text:p>
          </table:table-cell>
          <table:table-cell office:value-type="string">
            <text:p>0269-00</text:p>
          </table:table-cell>
          <table:table-cell office:value-type="string">
            <text:p>LLC 'Eni Energhia'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63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0"</text:p>
          </table:table-cell>
          <table:table-cell office:value-type="string">
            <text:p>2139-00</text:p>
          </table:table-cell>
          <table:table-cell office:value-type="string">
            <text:p>LLC 'Eni Energhia'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b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3"</text:p>
          </table:table-cell>
          <table:table-cell office:value-type="string">
            <text:p>0157-00</text:p>
          </table:table-cell>
          <table:table-cell office:value-type="string">
            <text:p>LLC 'Eni-Nefto'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7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8"</text:p>
          </table:table-cell>
          <table:table-cell office:value-type="string">
            <text:p>0114-00</text:p>
          </table:table-cell>
          <table:table-cell office:value-type="string">
            <text:p>LNG Shipping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721</text:p>
          </table:table-cell>
          <table:table-cell office:value-type="string">
            <text:p>f1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3"</text:p>
          </table:table-cell>
          <table:table-cell office:value-type="string">
            <text:p>0895-00</text:p>
          </table:table-cell>
          <table:table-cell office:value-type="string">
            <text:p>luigi conti vecchi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895</text:p>
          </table:table-cell>
          <table:table-cell office:value-type="string">
            <text:p>de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3"</text:p>
          </table:table-cell>
          <table:table-cell office:value-type="string">
            <text:p>2320-00</text:p>
          </table:table-cell>
          <table:table-cell office:value-type="string">
            <text:p>MATRIC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3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4"</text:p>
          </table:table-cell>
          <table:table-cell office:value-type="string">
            <text:p>0800-23</text:p>
          </table:table-cell>
          <table:table-cell office:value-type="string">
            <text:p>Mellitah Oil &amp; Gas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bd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3"</text:p>
          </table:table-cell>
          <table:table-cell office:value-type="string">
            <text:p>1312-00</text:p>
          </table:table-cell>
          <table:table-cell office:value-type="string">
            <text:p>Mellitah Oil &amp; Gas B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0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1"</text:p>
          </table:table-cell>
          <table:table-cell office:value-type="string">
            <text:p>0800-05</text:p>
          </table:table-cell>
          <table:table-cell office:value-type="string">
            <text:p>Midstream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035</text:p>
          </table:table-cell>
          <table:table-cell office:value-type="string">
            <text:p>b6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6"</text:p>
          </table:table-cell>
          <table:table-cell office:value-type="string">
            <text:p>2568-00</text:p>
          </table:table-cell>
          <table:table-cell office:value-type="string">
            <text:p>Mizamtec Operating Company S. 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8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1"</text:p>
          </table:table-cell>
          <table:table-cell office:value-type="string">
            <text:p>2585-00</text:p>
          </table:table-cell>
          <table:table-cell office:value-type="string">
            <text:p>Mozambique Rovuma Venture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85</text:p>
          </table:table-cell>
          <table:table-cell office:value-type="string">
            <text:p>5d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16"</text:p>
          </table:table-cell>
          <table:table-cell office:value-type="string">
            <text:p>2048-00</text:p>
          </table:table-cell>
          <table:table-cell office:value-type="string">
            <text:p>Mozambique Rovuma Ventur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c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2"</text:p>
          </table:table-cell>
          <table:table-cell office:value-type="string">
            <text:p>0800-08</text:p>
          </table:table-cell>
          <table:table-cell office:value-type="string">
            <text:p>Natural Resource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08</text:p>
          </table:table-cell>
          <table:table-cell office:value-type="string">
            <text:p>ea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9"</text:p>
          </table:table-cell>
          <table:table-cell office:value-type="string">
            <text:p>0047-00</text:p>
          </table:table-cell>
          <table:table-cell office:value-type="string">
            <text:p>Nigeria Lng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a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76"</text:p>
          </table:table-cell>
          <table:table-cell office:value-type="string">
            <text:p>1234-00</text:p>
          </table:table-cell>
          <table:table-cell office:value-type="string">
            <text:p>Nigerian Agip Exploration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9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9"</text:p>
          </table:table-cell>
          <table:table-cell office:value-type="string">
            <text:p>0007-00</text:p>
          </table:table-cell>
          <table:table-cell office:value-type="string">
            <text:p>Nigerian Agip Oil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b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1"</text:p>
          </table:table-cell>
          <table:table-cell office:value-type="string">
            <text:p>02640-00</text:p>
          </table:table-cell>
          <table:table-cell office:value-type="string">
            <text:p>North Caspian Operating Company N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40</text:p>
          </table:table-cell>
          <table:table-cell office:value-type="string">
            <text:p>e8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89"</text:p>
          </table:table-cell>
          <table:table-cell office:value-type="string">
            <text:p>1439-00</text:p>
          </table:table-cell>
          <table:table-cell office:value-type="string">
            <text:p>North Caspian Operating Company N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c59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4"</text:p>
          </table:table-cell>
          <table:table-cell office:value-type="string">
            <text:p>2344-00</text:p>
          </table:table-cell>
          <table:table-cell office:value-type="string">
            <text:p>NOVAMONT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4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71"</text:p>
          </table:table-cell>
          <table:table-cell office:value-type="string">
            <text:p>2489-00</text:p>
          </table:table-cell>
          <table:table-cell office:value-type="string">
            <text:p>OGCI Climate Investments LLP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1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6"</text:p>
          </table:table-cell>
          <table:table-cell office:value-type="string">
            <text:p>0237-00</text:p>
          </table:table-cell>
          <table:table-cell office:value-type="string">
            <text:p>Olèoduc du Rhone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c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2"</text:p>
          </table:table-cell>
          <table:table-cell office:value-type="string">
            <text:p>3091-00</text:p>
          </table:table-cell>
          <table:table-cell office:value-type="string">
            <text:p>PENGERANG BIOREFINERY SDN. BH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2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6"</text:p>
          </table:table-cell>
          <table:table-cell office:value-type="string">
            <text:p>0040-00</text:p>
          </table:table-cell>
          <table:table-cell office:value-type="string">
            <text:p>Petrobel Belayim Petroleum Co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3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1"</text:p>
          </table:table-cell>
          <table:table-cell office:value-type="string">
            <text:p>2289-00</text:p>
          </table:table-cell>
          <table:table-cell office:value-type="string">
            <text:p>PetroBicentenario 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1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63"</text:p>
          </table:table-cell>
          <table:table-cell office:value-type="string">
            <text:p>2036-00</text:p>
          </table:table-cell>
          <table:table-cell office:value-type="string">
            <text:p>PetroJunín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036</text:p>
          </table:table-cell>
          <table:table-cell office:value-type="string">
            <text:p>f9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7"</text:p>
          </table:table-cell>
          <table:table-cell office:value-type="string">
            <text:p>2270-00</text:p>
          </table:table-cell>
          <table:table-cell office:value-type="string">
            <text:p>PetroJunín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c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2"</text:p>
          </table:table-cell>
          <table:table-cell office:value-type="string">
            <text:p>2163-00</text:p>
          </table:table-cell>
          <table:table-cell office:value-type="string">
            <text:p>PetroSucre,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48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4"</text:p>
          </table:table-cell>
          <table:table-cell office:value-type="string">
            <text:p>0198-00</text:p>
          </table:table-cell>
          <table:table-cell office:value-type="string">
            <text:p>PETROVEN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422</text:p>
          </table:table-cell>
          <table:table-cell office:value-type="string">
            <text:p>07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15"</text:p>
          </table:table-cell>
          <table:table-cell office:value-type="string">
            <text:p>2577-00</text:p>
          </table:table-cell>
          <table:table-cell office:value-type="string">
            <text:p>Plenitude Energy Service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77</text:p>
          </table:table-cell>
          <table:table-cell office:value-type="string">
            <text:p>f2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49"</text:p>
          </table:table-cell>
          <table:table-cell office:value-type="string">
            <text:p>2687-00</text:p>
          </table:table-cell>
          <table:table-cell office:value-type="string">
            <text:p>Plenitude On The Road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0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9"</text:p>
          </table:table-cell>
          <table:table-cell office:value-type="string">
            <text:p>2798-00</text:p>
          </table:table-cell>
          <table:table-cell office:value-type="string">
            <text:p>PLT Puregreen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5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4"</text:p>
          </table:table-cell>
          <table:table-cell office:value-type="string">
            <text:p>2802-00</text:p>
          </table:table-cell>
          <table:table-cell office:value-type="string">
            <text:p>PLT Spagna S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a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83"</text:p>
          </table:table-cell>
          <table:table-cell office:value-type="string">
            <text:p>0335-00</text:p>
          </table:table-cell>
          <table:table-cell office:value-type="string">
            <text:p>Polimeri Europa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2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9"</text:p>
          </table:table-cell>
          <table:table-cell office:value-type="string">
            <text:p>0800-09</text:p>
          </table:table-cell>
          <table:table-cell office:value-type="string">
            <text:p>Power Generation &amp; Marketing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09</text:p>
          </table:table-cell>
          <table:table-cell office:value-type="string">
            <text:p>c6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7"</text:p>
          </table:table-cell>
          <table:table-cell office:value-type="string">
            <text:p>3068-00</text:p>
          </table:table-cell>
          <table:table-cell office:value-type="string">
            <text:p>PT Eni Natural Energies Indonesi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c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5"</text:p>
          </table:table-cell>
          <table:table-cell office:value-type="string">
            <text:p>0210-00</text:p>
          </table:table-cell>
          <table:table-cell office:value-type="string">
            <text:p>Raffineria di Gel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75</text:p>
          </table:table-cell>
          <table:table-cell office:value-type="string">
            <text:p>b6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5"</text:p>
          </table:table-cell>
          <table:table-cell office:value-type="string">
            <text:p>0800-04</text:p>
          </table:table-cell>
          <table:table-cell office:value-type="string">
            <text:p>REFINING EVOLUTION AND TRANSFORM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32</text:p>
          </table:table-cell>
          <table:table-cell office:value-type="string">
            <text:p>c0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2"</text:p>
          </table:table-cell>
          <table:table-cell office:value-type="string">
            <text:p>0800-04</text:p>
          </table:table-cell>
          <table:table-cell office:value-type="string">
            <text:p>Refining Evolution and Transform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c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8"</text:p>
          </table:table-cell>
          <table:table-cell office:value-type="string">
            <text:p>0800-04</text:p>
          </table:table-cell>
          <table:table-cell office:value-type="string">
            <text:p>Refining&amp;Marketing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32</text:p>
          </table:table-cell>
          <table:table-cell office:value-type="string">
            <text:p>23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8"</text:p>
          </table:table-cell>
          <table:table-cell office:value-type="string">
            <text:p>3045-00</text:p>
          </table:table-cell>
          <table:table-cell office:value-type="string">
            <text:p>REWAVE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f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42"</text:p>
          </table:table-cell>
          <table:table-cell office:value-type="string">
            <text:p>0700-00</text:p>
          </table:table-cell>
          <table:table-cell office:value-type="string">
            <text:p>Saipem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d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3"</text:p>
          </table:table-cell>
          <table:table-cell office:value-type="string">
            <text:p>2651-00</text:p>
          </table:table-cell>
          <table:table-cell office:value-type="string">
            <text:p>Saipem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51</text:p>
          </table:table-cell>
          <table:table-cell office:value-type="string">
            <text:p>8c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5"</text:p>
          </table:table-cell>
          <table:table-cell office:value-type="string">
            <text:p>2515-00</text:p>
          </table:table-cell>
          <table:table-cell office:value-type="string">
            <text:p>SEA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15</text:p>
          </table:table-cell>
          <table:table-cell office:value-type="string">
            <text:p>d3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09"</text:p>
          </table:table-cell>
          <table:table-cell office:value-type="string">
            <text:p>1467-00</text:p>
          </table:table-cell>
          <table:table-cell office:value-type="string">
            <text:p>SEA Sp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dc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96"</text:p>
          </table:table-cell>
          <table:table-cell office:value-type="string">
            <text:p>2659-00</text:p>
          </table:table-cell>
          <table:table-cell office:value-type="string">
            <text:p>SeaCorridor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d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9"</text:p>
          </table:table-cell>
          <table:table-cell office:value-type="string">
            <text:p>0193-00</text:p>
          </table:table-cell>
          <table:table-cell office:value-type="string">
            <text:p>serfactoring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406</text:p>
          </table:table-cell>
          <table:table-cell office:value-type="string">
            <text:p>2a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4"</text:p>
          </table:table-cell>
          <table:table-cell office:value-type="string">
            <text:p>0193-00</text:p>
          </table:table-cell>
          <table:table-cell office:value-type="string">
            <text:p>Serfactoring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9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39"</text:p>
          </table:table-cell>
          <table:table-cell office:value-type="string">
            <text:p>0951-00</text:p>
          </table:table-cell>
          <table:table-cell office:value-type="string">
            <text:p>servizi aerei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674</text:p>
          </table:table-cell>
          <table:table-cell office:value-type="string">
            <text:p>56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2"</text:p>
          </table:table-cell>
          <table:table-cell office:value-type="string">
            <text:p>0951-00</text:p>
          </table:table-cell>
          <table:table-cell office:value-type="string">
            <text:p>Servizi Aere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5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2"</text:p>
          </table:table-cell>
          <table:table-cell office:value-type="string">
            <text:p>0802-00</text:p>
          </table:table-cell>
          <table:table-cell office:value-type="string">
            <text:p>Servizi Fondo Bombole Metano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b7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61"</text:p>
          </table:table-cell>
          <table:table-cell office:value-type="string">
            <text:p>ENTERPRISE</text:p>
          </table:table-cell>
          <table:table-cell office:value-type="string">
            <text:p>Set aziendal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0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60"</text:p>
          </table:table-cell>
          <table:table-cell office:value-type="string">
            <text:p>COMMON</text:p>
          </table:table-cell>
          <table:table-cell office:value-type="string">
            <text:p>Set comu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f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80"</text:p>
          </table:table-cell>
          <table:table-cell office:value-type="string">
            <text:p>2254-00</text:p>
          </table:table-cell>
          <table:table-cell office:value-type="string">
            <text:p>società adriatica idrocarburi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254</text:p>
          </table:table-cell>
          <table:table-cell office:value-type="string">
            <text:p>cb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2"</text:p>
          </table:table-cell>
          <table:table-cell office:value-type="string">
            <text:p>2254-00</text:p>
          </table:table-cell>
          <table:table-cell office:value-type="string">
            <text:p>Società Adriatica Idrocarbur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2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2"</text:p>
          </table:table-cell>
          <table:table-cell office:value-type="string">
            <text:p>2800-00</text:p>
          </table:table-cell>
          <table:table-cell office:value-type="string">
            <text:p>Società Agricola Forestale Pianura Verde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7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13"</text:p>
          </table:table-cell>
          <table:table-cell office:value-type="string">
            <text:p>2801-00</text:p>
          </table:table-cell>
          <table:table-cell office:value-type="string">
            <text:p>Società Agricola L'Albero Azzurro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9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62"</text:p>
          </table:table-cell>
          <table:table-cell office:value-type="string">
            <text:p>Z000-00</text:p>
          </table:table-cell>
          <table:table-cell office:value-type="string">
            <text:p>Società Chius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1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5"</text:p>
          </table:table-cell>
          <table:table-cell office:value-type="string">
            <text:p>0195-00</text:p>
          </table:table-cell>
          <table:table-cell office:value-type="string">
            <text:p>Società EniPower Ferrara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b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59"</text:p>
          </table:table-cell>
          <table:table-cell office:value-type="string">
            <text:p>2241-00</text:p>
          </table:table-cell>
          <table:table-cell office:value-type="string">
            <text:p>Società Ionica Gas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f2d2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33"</text:p>
          </table:table-cell>
          <table:table-cell office:value-type="string">
            <text:p>2255-00</text:p>
          </table:table-cell>
          <table:table-cell office:value-type="string">
            <text:p>Società Ionica Ga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63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19"</text:p>
          </table:table-cell>
          <table:table-cell office:value-type="string">
            <text:p>0195-00</text:p>
          </table:table-cell>
          <table:table-cell office:value-type="string">
            <text:p>Società  EniPower Ferrara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757</text:p>
          </table:table-cell>
          <table:table-cell office:value-type="string">
            <text:p>99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3"</text:p>
          </table:table-cell>
          <table:table-cell office:value-type="string">
            <text:p>2255-00</text:p>
          </table:table-cell>
          <table:table-cell office:value-type="string">
            <text:p>Società  Ionica Ga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255</text:p>
          </table:table-cell>
          <table:table-cell office:value-type="string">
            <text:p>b5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28"</text:p>
          </table:table-cell>
          <table:table-cell office:value-type="string">
            <text:p>2218-00</text:p>
          </table:table-cell>
          <table:table-cell office:value-type="string">
            <text:p>Société Centrale Electrique du Congo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58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1"</text:p>
          </table:table-cell>
          <table:table-cell office:value-type="string">
            <text:p>0448-00</text:p>
          </table:table-cell>
          <table:table-cell office:value-type="string">
            <text:p>Société de Service du Gazoduc Transtunisien SA - SERGAZ 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9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6"</text:p>
          </table:table-cell>
          <table:table-cell office:value-type="string">
            <text:p>0934-00</text:p>
          </table:table-cell>
          <table:table-cell office:value-type="string">
            <text:p>Société Energies Renouvelables Eni-ETAP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e8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3"</text:p>
          </table:table-cell>
          <table:table-cell office:value-type="string">
            <text:p>2552-00</text:p>
          </table:table-cell>
          <table:table-cell office:value-type="string">
            <text:p>Société Energies Renouvelables Eni-ETAP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c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7"</text:p>
          </table:table-cell>
          <table:table-cell office:value-type="string">
            <text:p>0041-00</text:p>
          </table:table-cell>
          <table:table-cell office:value-type="string">
            <text:p>SOCIETE' ITALO-TUNISIENNE D'EXPLOITATION PETROLIERE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5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4"</text:p>
          </table:table-cell>
          <table:table-cell office:value-type="string">
            <text:p>8345-00</text:p>
          </table:table-cell>
          <table:table-cell office:value-type="string">
            <text:p>Société pour la Construction du Gazoduc Transtunisien SA (SCOGAT)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fe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7"</text:p>
          </table:table-cell>
          <table:table-cell office:value-type="string">
            <text:p>0200-00</text:p>
          </table:table-cell>
          <table:table-cell office:value-type="string">
            <text:p>SODEPS - Sociètè de Développement et d'Exploitation du Permis du Sud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c2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8"</text:p>
          </table:table-cell>
          <table:table-cell office:value-type="string">
            <text:p>0042-00</text:p>
          </table:table-cell>
          <table:table-cell office:value-type="string">
            <text:p>SODEPS - Sociètè de Développement et d'Exploitation du Permis du Sud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7a7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9"</text:p>
          </table:table-cell>
          <table:table-cell office:value-type="string">
            <text:p>0800-01</text:p>
          </table:table-cell>
          <table:table-cell office:value-type="string">
            <text:p>Support function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47</text:p>
          </table:table-cell>
          <table:table-cell office:value-type="string">
            <text:p>92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0"</text:p>
          </table:table-cell>
          <table:table-cell office:value-type="string">
            <text:p>2009-00</text:p>
          </table:table-cell>
          <table:table-cell office:value-type="string">
            <text:p>Support Functions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93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49"</text:p>
          </table:table-cell>
          <table:table-cell office:value-type="string">
            <text:p>0800-01</text:p>
          </table:table-cell>
          <table:table-cell office:value-type="string">
            <text:p>Support Function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3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0"</text:p>
          </table:table-cell>
          <table:table-cell office:value-type="string">
            <text:p>2587-00</text:p>
          </table:table-cell>
          <table:table-cell office:value-type="string">
            <text:p>Sustainable Mobility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87</text:p>
          </table:table-cell>
          <table:table-cell office:value-type="string">
            <text:p>b5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76"</text:p>
          </table:table-cell>
          <table:table-cell office:value-type="string">
            <text:p>0800-12</text:p>
          </table:table-cell>
          <table:table-cell office:value-type="string">
            <text:p>SUSTAINABLE MOBILITY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9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6"</text:p>
          </table:table-cell>
          <table:table-cell office:value-type="string">
            <text:p>0800-12</text:p>
          </table:table-cell>
          <table:table-cell office:value-type="string">
            <text:p>Sustainable Mobility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7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40"</text:p>
          </table:table-cell>
          <table:table-cell office:value-type="string">
            <text:p>3051-00</text:p>
          </table:table-cell>
          <table:table-cell office:value-type="string">
            <text:p>Tasonis DirectorShip S.L.U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298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5"</text:p>
          </table:table-cell>
          <table:table-cell office:value-type="string">
            <text:p>1886-00</text:p>
          </table:table-cell>
          <table:table-cell office:value-type="string">
            <text:p>TECNINCO Engineering Contractors Limited Liability Partnership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a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37"</text:p>
          </table:table-cell>
          <table:table-cell office:value-type="string">
            <text:p>3044-00</text:p>
          </table:table-cell>
          <table:table-cell office:value-type="string">
            <text:p>Tecnofilm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56e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08"</text:p>
          </table:table-cell>
          <table:table-cell office:value-type="string">
            <text:p>0670-00</text:p>
          </table:table-cell>
          <table:table-cell office:value-type="string">
            <text:p>tecnomar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475df2c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38"</text:p>
          </table:table-cell>
          <table:table-cell office:value-type="string">
            <text:p>0346-00</text:p>
          </table:table-cell>
          <table:table-cell office:value-type="string">
            <text:p>Trans Tunisian Pipeline Company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4fd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2"</text:p>
          </table:table-cell>
          <table:table-cell office:value-type="string">
            <text:p>0346-00</text:p>
          </table:table-cell>
          <table:table-cell office:value-type="string">
            <text:p>ttpc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46</text:p>
          </table:table-cell>
          <table:table-cell office:value-type="string">
            <text:p>29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7"</text:p>
          </table:table-cell>
          <table:table-cell office:value-type="string">
            <text:p>1925-00</text:p>
          </table:table-cell>
          <table:table-cell office:value-type="string">
            <text:p>Union Fenosa Gas S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c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4"</text:p>
          </table:table-cell>
          <table:table-cell office:value-type="string">
            <text:p>1784-00</text:p>
          </table:table-cell>
          <table:table-cell office:value-type="string">
            <text:p>United Gas Derivatives Company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9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3"</text:p>
          </table:table-cell>
          <table:table-cell office:value-type="string">
            <text:p>0800-02</text:p>
          </table:table-cell>
          <table:table-cell office:value-type="string">
            <text:p>Ups Exp Dev Oper&amp;Ener eff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001</text:p>
          </table:table-cell>
          <table:table-cell office:value-type="string">
            <text:p>ad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61"</text:p>
          </table:table-cell>
          <table:table-cell office:value-type="string">
            <text:p>0194-00</text:p>
          </table:table-cell>
          <table:table-cell office:value-type="string">
            <text:p>UPS, Exp, Dev, Oper&amp;Ener eff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94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1"</text:p>
          </table:table-cell>
          <table:table-cell office:value-type="string">
            <text:p>0800-02</text:p>
          </table:table-cell>
          <table:table-cell office:value-type="string">
            <text:p>UPS, Exp, Dev, Oper&amp;Ener eff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b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52"</text:p>
          </table:table-cell>
          <table:table-cell office:value-type="string">
            <text:p>0800-02</text:p>
          </table:table-cell>
          <table:table-cell office:value-type="string">
            <text:p>Upstream and Technical Service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001</text:p>
          </table:table-cell>
          <table:table-cell office:value-type="string">
            <text:p>8b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21"</text:p>
          </table:table-cell>
          <table:table-cell office:value-type="string">
            <text:p>0011-00</text:p>
          </table:table-cell>
          <table:table-cell office:value-type="string">
            <text:p>Vår Energi A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d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0"</text:p>
          </table:table-cell>
          <table:table-cell office:value-type="string">
            <text:p>2454-00</text:p>
          </table:table-cell>
          <table:table-cell office:value-type="string">
            <text:p>Versalis Americas Inc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a8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9"</text:p>
          </table:table-cell>
          <table:table-cell office:value-type="string">
            <text:p>2488-00</text:p>
          </table:table-cell>
          <table:table-cell office:value-type="string">
            <text:p>Versalis Asia Pacific PTE. LTD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e9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6"</text:p>
          </table:table-cell>
          <table:table-cell office:value-type="string">
            <text:p>2467-00</text:p>
          </table:table-cell>
          <table:table-cell office:value-type="string">
            <text:p>Versalis Congo Sarlu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c6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25"</text:p>
          </table:table-cell>
          <table:table-cell office:value-type="string">
            <text:p>2410-00</text:p>
          </table:table-cell>
          <table:table-cell office:value-type="string">
            <text:p>Versalis Deutschland GmbH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410</text:p>
          </table:table-cell>
          <table:table-cell office:value-type="string">
            <text:p>07cfe832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01"</text:p>
          </table:table-cell>
          <table:table-cell office:value-type="string">
            <text:p>1706-00</text:p>
          </table:table-cell>
          <table:table-cell office:value-type="string">
            <text:p>Versalis Deutschland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f5a094b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1"</text:p>
          </table:table-cell>
          <table:table-cell office:value-type="string">
            <text:p>0917-00</text:p>
          </table:table-cell>
          <table:table-cell office:value-type="string">
            <text:p>Versalis France SA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1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06"</text:p>
          </table:table-cell>
          <table:table-cell office:value-type="string">
            <text:p>2795-00</text:p>
          </table:table-cell>
          <table:table-cell office:value-type="string">
            <text:p>Versalis International Cote d’Ivoir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d16d485d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9"</text:p>
          </table:table-cell>
          <table:table-cell office:value-type="string">
            <text:p>2769-00</text:p>
          </table:table-cell>
          <table:table-cell office:value-type="string">
            <text:p>VERSALIS INTERNATIONAL S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69</text:p>
          </table:table-cell>
          <table:table-cell office:value-type="string">
            <text:p>c4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0"</text:p>
          </table:table-cell>
          <table:table-cell office:value-type="string">
            <text:p>0916-00</text:p>
          </table:table-cell>
          <table:table-cell office:value-type="string">
            <text:p>VERSALIS INTERNATIONAL S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d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77"</text:p>
          </table:table-cell>
          <table:table-cell office:value-type="string">
            <text:p>2210-00</text:p>
          </table:table-cell>
          <table:table-cell office:value-type="string">
            <text:p>Versalis Kimya Ticaret Limited Sirketi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N/A</text:p>
          </table:table-cell>
          <table:table-cell office:value-type="string">
            <text:p>c10fd626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58"</text:p>
          </table:table-cell>
          <table:table-cell office:value-type="string">
            <text:p>0856-00</text:p>
          </table:table-cell>
          <table:table-cell office:value-type="string">
            <text:p>Versalis Kimya Ticaret Limited Sirketi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1a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14"</text:p>
          </table:table-cell>
          <table:table-cell office:value-type="string">
            <text:p>2591-00</text:p>
          </table:table-cell>
          <table:table-cell office:value-type="string">
            <text:p>Versalis México S. de R.L. de C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1</text:p>
          </table:table-cell>
          <table:table-cell office:value-type="string">
            <text:p>e6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81"</text:p>
          </table:table-cell>
          <table:table-cell office:value-type="string">
            <text:p>2546-00</text:p>
          </table:table-cell>
          <table:table-cell office:value-type="string">
            <text:p>Versalis México S. 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a9c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0"</text:p>
          </table:table-cell>
          <table:table-cell office:value-type="string">
            <text:p>3045-00</text:p>
          </table:table-cell>
          <table:table-cell office:value-type="string">
            <text:p>Versalis Oilfield Solution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3045</text:p>
          </table:table-cell>
          <table:table-cell office:value-type="string">
            <text:p>a8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55"</text:p>
          </table:table-cell>
          <table:table-cell office:value-type="string">
            <text:p>2435-00</text:p>
          </table:table-cell>
          <table:table-cell office:value-type="string">
            <text:p>VERSALIS PACIFIC (INDIA) PRIVATE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83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46"</text:p>
          </table:table-cell>
          <table:table-cell office:value-type="string">
            <text:p>2356-00</text:p>
          </table:table-cell>
          <table:table-cell office:value-type="string">
            <text:p>Versalis Pacific Trading (Shanghai) Co.,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76a62051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526"</text:p>
          </table:table-cell>
          <table:table-cell office:value-type="string">
            <text:p>0335-00</text:p>
          </table:table-cell>
          <table:table-cell office:value-type="string">
            <text:p>versali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883</text:p>
          </table:table-cell>
          <table:table-cell office:value-type="string">
            <text:p>b92ed620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55"</text:p>
          </table:table-cell>
          <table:table-cell office:value-type="string">
            <text:p>8915-00</text:p>
          </table:table-cell>
          <table:table-cell office:value-type="string">
            <text:p>Versalis UK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0f994a63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9"</text:p>
          </table:table-cell>
          <table:table-cell office:value-type="string">
            <text:p>0800-03</text:p>
          </table:table-cell>
          <table:table-cell office:value-type="string">
            <text:p>Versalis Zeal Lt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419</text:p>
          </table:table-cell>
          <table:table-cell office:value-type="string">
            <text:p>c7a6ef3e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867"</text:p>
          </table:table-cell>
          <table:table-cell office:value-type="string">
            <text:p>2482-00</text:p>
          </table:table-cell>
          <table:table-cell office:value-type="string">
            <text:p>Versalis Zeal Lt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ce9b2e57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768"</text:p>
          </table:table-cell>
          <table:table-cell office:value-type="string">
            <text:p>1188-0</text:p>
          </table:table-cell>
          <table:table-cell office:value-type="string">
            <text:p>XXXX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3ffe0445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697"</text:p>
          </table:table-cell>
          <table:table-cell office:value-type="string">
            <text:p>2472-00</text:p>
          </table:table-cell>
          <table:table-cell office:value-type="string">
            <text:p>Zenit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fd3e838-9c38-f111-88b5-7ced8d48fdaf</text:p>
          </table:table-cell>
          <table:table-cell table:number-columns-repeated="1018"/>
        </table:table-row>
        <table:table-row table:style-name="ro1">
          <table:table-cell office:value-type="string">
            <text:p>W/"5882963"</text:p>
          </table:table-cell>
          <table:table-cell office:value-type="string">
            <text:p>ZFOD-00</text:p>
          </table:table-cell>
          <table:table-cell office:value-type="string">
            <text:p>Zubair Field Operating Divis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N/A</text:p>
          </table:table-cell>
          <table:table-cell office:value-type="string">
            <text:p>22994a63-9c38-f111-88b5-7ced8d48fdaf</text:p>
          </table:table-cell>
          <table:table-cell table:number-columns-repeated="1018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8000" number:language="it" number:country="IT">
      <number:number number:min-integer-digits="1"/>
    </number:number-style>
    <number:date-style style:name="N103">
      <number:year number:style="long"/>
      <number:text>-</number:text>
      <number:month number:style="long"/>
    </number:date-style>
    <number:date-style style:name="N104">
      <number:year number:style="long"/>
      <number:text>-</number:text>
      <number:month/>
    </number:dat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5">15/04/2026</text:date>, <text:time>11.17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15T11:17:18.97</dc:date>
    <meta:document-statistic meta:table-count="1" meta:cell-count="2544" meta:object-count="0"/>
    <meta:generator>OpenOffice/4.1.15$Win32 OpenOffice.org_project/4115m2$Build-9813</meta:generator>
  </office:meta>
</office:document-meta>
</file>